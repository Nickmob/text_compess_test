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1cm"/>
    </style:style>
    <style:style style:name="co2" style:family="table-column">
      <style:table-column-properties fo:break-before="auto" style:column-width="4.951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98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3.84cm"/>
    </style:style>
    <style:style style:name="co9" style:family="table-column">
      <style:table-column-properties fo:break-before="auto" style:column-width="5.249cm"/>
    </style:style>
    <style:style style:name="co10" style:family="table-column">
      <style:table-column-properties fo:break-before="auto" style:column-width="6.264cm"/>
    </style:style>
    <style:style style:name="co11" style:family="table-column">
      <style:table-column-properties fo:break-before="auto" style:column-width="3.392cm"/>
    </style:style>
    <style:style style:name="co12" style:family="table-column">
      <style:table-column-properties fo:break-before="auto" style:column-width="4.332cm"/>
    </style:style>
    <style:style style:name="co13" style:family="table-column">
      <style:table-column-properties fo:break-before="auto" style:column-width="3.318cm"/>
    </style:style>
    <style:style style:name="co14" style:family="table-column">
      <style:table-column-properties fo:break-before="auto" style:column-width="3.05cm"/>
    </style:style>
    <style:style style:name="co15" style:family="table-column">
      <style:table-column-properties fo:break-before="auto" style:column-width="5.124cm"/>
    </style:style>
    <style:style style:name="co16" style:family="table-column">
      <style:table-column-properties fo:break-before="auto" style:column-width="3.214cm"/>
    </style:style>
    <style:style style:name="co17" style:family="table-column">
      <style:table-column-properties fo:break-before="auto" style:column-width="4.655cm"/>
    </style:style>
    <style:style style:name="co18" style:family="table-column">
      <style:table-column-properties fo:break-before="auto" style:column-width="3.044cm"/>
    </style:style>
    <style:style style:name="co19" style:family="table-column">
      <style:table-column-properties fo:break-before="auto" style:column-width="3.119cm"/>
    </style:style>
    <style:style style:name="co20" style:family="table-column">
      <style:table-column-properties fo:break-before="auto" style:column-width="3.639cm"/>
    </style:style>
    <style:style style:name="co21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4"/>
    <style:style style:name="ce4" style:family="table-cell" style:parent-style-name="Default" style:data-style-name="N1"/>
    <style:style style:name="ce5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TML" table:style-name="ta1">
        <table:shapes>
          <draw:frame draw:z-index="0" draw:style-name="gr1" draw:text-style-name="P1" svg:width="25.659cm" svg:height="16.983cm" svg:x="0cm" svg:y="12.293cm">
            <draw:object draw:notify-on-update-of-ranges="HTML.A5:HTML.A5 HTML.A6:HTML.A48 HTML.H5:HTML.H5 HTML.H6:HTML.H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6" table:default-cell-style-name="ce1"/>
        <table:table-column table:style-name="co6" table:visibility="collapse" table:default-cell-style-name="Default"/>
        <table:table-column table:style-name="co7" table:default-cell-style-name="ce5"/>
        <table:table-row table:style-name="ro1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,/lzbench -o4 -ezlib/brotli/zstd webster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Compressor name/level</text:p>
          </table:table-cell>
          <table:table-cell table:style-name="ce2" office:value-type="string" calcext:value-type="string">
            <text:p>Compression speed (MB/s)</text:p>
          </table:table-cell>
          <table:table-cell table:style-name="ce2" office:value-type="string" calcext:value-type="string">
            <text:p>Decompression speed (MB/s)</text:p>
          </table:table-cell>
          <table:table-cell table:style-name="ce2" office:value-type="string" calcext:value-type="string">
            <text:p>Original size (B)</text:p>
          </table:table-cell>
          <table:table-cell table:style-name="ce2" office:value-type="string" calcext:value-type="string">
            <text:p>Compressed size (B)</text:p>
          </table:table-cell>
          <table:table-cell table:style-name="ce2" office:value-type="string" calcext:value-type="string">
            <text:p>Ratio (%)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Total time (ms)</text:p>
          </table:table-cell>
        </table:table-row>
        <table:table-row table:style-name="ro1">
          <table:table-cell office:value-type="string" calcext:value-type="string">
            <text:p>zlib 1.3.1 -1</text:p>
          </table:table-cell>
          <table:table-cell office:value-type="float" office:value="141.53" calcext:value-type="float">
            <text:p>141,53</text:p>
          </table:table-cell>
          <table:table-cell office:value-type="float" office:value="469.47" calcext:value-type="float">
            <text:p>469,47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4991242" calcext:value-type="float">
            <text:p>14991242</text:p>
          </table:table-cell>
          <table:table-cell office:value-type="float" office:value="36.16" calcext:value-type="float">
            <text:p>36,16</text:p>
          </table:table-cell>
          <table:table-cell office:value-type="string" calcext:value-type="string">
            <text:p>webster</text:p>
          </table:table-cell>
          <table:table-cell table:formula="of:=([$Settings.$D$4]*([.F6]/100)/[$Settings.$B$4]+[$Settings.$D$4]/[.B6]+[$Settings.$D$4]*([.F6]/100)/[.C6])*1000+[$Settings.$C$4]" office:value-type="float" office:value="379.435870053338" calcext:value-type="float">
            <text:p>379,44</text:p>
          </table:table-cell>
        </table:table-row>
        <table:table-row table:style-name="ro1">
          <table:table-cell office:value-type="string" calcext:value-type="string">
            <text:p>zlib 1.3.1 -2</text:p>
          </table:table-cell>
          <table:table-cell office:value-type="float" office:value="124.57" calcext:value-type="float">
            <text:p>124,57</text:p>
          </table:table-cell>
          <table:table-cell office:value-type="float" office:value="489.41" calcext:value-type="float">
            <text:p>489,41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4249698" calcext:value-type="float">
            <text:p>14249698</text:p>
          </table:table-cell>
          <table:table-cell office:value-type="float" office:value="34.37" calcext:value-type="float">
            <text:p>34,37</text:p>
          </table:table-cell>
          <table:table-cell office:value-type="string" calcext:value-type="string">
            <text:p>webster</text:p>
          </table:table-cell>
          <table:table-cell table:formula="of:=([$Settings.$D$4]*([.F7]/100)/[$Settings.$B$4]+[$Settings.$D$4]/[.B7]+[$Settings.$D$4]*([.F7]/100)/[.C7])*1000+[$Settings.$C$4]" office:value-type="float" office:value="362.429889162439" calcext:value-type="float">
            <text:p>362,43</text:p>
          </table:table-cell>
        </table:table-row>
        <table:table-row table:style-name="ro1">
          <table:table-cell office:value-type="string" calcext:value-type="string">
            <text:p>zlib 1.3.1 -3</text:p>
          </table:table-cell>
          <table:table-cell office:value-type="float" office:value="91.49" calcext:value-type="float">
            <text:p>91,49</text:p>
          </table:table-cell>
          <table:table-cell office:value-type="float" office:value="508.62" calcext:value-type="float">
            <text:p>508,62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3627767" calcext:value-type="float">
            <text:p>13627767</text:p>
          </table:table-cell>
          <table:table-cell office:value-type="float" office:value="32.87" calcext:value-type="float">
            <text:p>32,87</text:p>
          </table:table-cell>
          <table:table-cell office:value-type="string" calcext:value-type="string">
            <text:p>webster</text:p>
          </table:table-cell>
          <table:table-cell table:formula="of:=([$Settings.$D$4]*([.F8]/100)/[$Settings.$B$4]+[$Settings.$D$4]/[.B8]+[$Settings.$D$4]*([.F8]/100)/[.C8])*1000+[$Settings.$C$4]" office:value-type="float" office:value="350.276414804637" calcext:value-type="float">
            <text:p>350,28</text:p>
          </table:table-cell>
        </table:table-row>
        <table:table-row table:style-name="ro1">
          <table:table-cell office:value-type="string" calcext:value-type="string">
            <text:p>zlib 1.3.1 -4</text:p>
          </table:table-cell>
          <table:table-cell office:value-type="float" office:value="82.58" calcext:value-type="float">
            <text:p>82,58</text:p>
          </table:table-cell>
          <table:table-cell office:value-type="float" office:value="485.64" calcext:value-type="float">
            <text:p>485,64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3001996" calcext:value-type="float">
            <text:p>13001996</text:p>
          </table:table-cell>
          <table:table-cell office:value-type="float" office:value="31.36" calcext:value-type="float">
            <text:p>31,36</text:p>
          </table:table-cell>
          <table:table-cell office:value-type="string" calcext:value-type="string">
            <text:p>webster</text:p>
          </table:table-cell>
          <table:table-cell table:formula="of:=([$Settings.$D$4]*([.F9]/100)/[$Settings.$B$4]+[$Settings.$D$4]/[.B9]+[$Settings.$D$4]*([.F9]/100)/[.C9])*1000+[$Settings.$C$4]" office:value-type="float" office:value="336.35521542518" calcext:value-type="float">
            <text:p>336,36</text:p>
          </table:table-cell>
        </table:table-row>
        <table:table-row table:style-name="ro1">
          <table:table-cell office:value-type="string" calcext:value-type="string">
            <text:p>zlib 1.3.1 -5</text:p>
          </table:table-cell>
          <table:table-cell office:value-type="float" office:value="55.63" calcext:value-type="float">
            <text:p>55,63</text:p>
          </table:table-cell>
          <table:table-cell office:value-type="float" office:value="483.93" calcext:value-type="float">
            <text:p>483,93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2445997" calcext:value-type="float">
            <text:p>12445997</text:p>
          </table:table-cell>
          <table:table-cell office:value-type="float" office:value="30.02" calcext:value-type="float">
            <text:p>30,02</text:p>
          </table:table-cell>
          <table:table-cell office:value-type="string" calcext:value-type="string">
            <text:p>webster</text:p>
          </table:table-cell>
          <table:table-cell table:formula="of:=([$Settings.$D$4]*([.F10]/100)/[$Settings.$B$4]+[$Settings.$D$4]/[.B10]+[$Settings.$D$4]*([.F10]/100)/[.C10])*1000+[$Settings.$C$4]" office:value-type="float" office:value="328.796249929688" calcext:value-type="float">
            <text:p>328,80</text:p>
          </table:table-cell>
        </table:table-row>
        <table:table-row table:style-name="ro1" table:visibility="collapse">
          <table:table-cell office:value-type="string" calcext:value-type="string">
            <text:p>zlib 1.3.1 -6</text:p>
          </table:table-cell>
          <table:table-cell office:value-type="float" office:value="37.88" calcext:value-type="float">
            <text:p>37,88</text:p>
          </table:table-cell>
          <table:table-cell office:value-type="float" office:value="496.23" calcext:value-type="float">
            <text:p>496,23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2213947" calcext:value-type="float">
            <text:p>12213947</text:p>
          </table:table-cell>
          <table:table-cell office:value-type="float" office:value="29.46" calcext:value-type="float">
            <text:p>29,46</text:p>
          </table:table-cell>
          <table:table-cell office:value-type="string" calcext:value-type="string">
            <text:p>webster</text:p>
          </table:table-cell>
          <table:table-cell table:formula="of:=([$Settings.$D$4]*([.F11]/100)/[$Settings.$B$4]+[$Settings.$D$4]/[.B11]+[$Settings.$D$4]*([.F11]/100)/[.C11])*1000+[$Settings.$C$4]" office:value-type="float" office:value="331.592831546481" calcext:value-type="float">
            <text:p>331,59</text:p>
          </table:table-cell>
        </table:table-row>
        <table:table-row table:style-name="ro1" table:visibility="collapse">
          <table:table-cell office:value-type="string" calcext:value-type="string">
            <text:p>zlib 1.3.1 -7</text:p>
          </table:table-cell>
          <table:table-cell office:value-type="float" office:value="30.07" calcext:value-type="float">
            <text:p>30,07</text:p>
          </table:table-cell>
          <table:table-cell office:value-type="float" office:value="499.3" calcext:value-type="float">
            <text:p>499,30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2130422" calcext:value-type="float">
            <text:p>12130422</text:p>
          </table:table-cell>
          <table:table-cell office:value-type="float" office:value="29.26" calcext:value-type="float">
            <text:p>29,26</text:p>
          </table:table-cell>
          <table:table-cell office:value-type="string" calcext:value-type="string">
            <text:p>webster</text:p>
          </table:table-cell>
          <table:table-cell table:formula="of:=([$Settings.$D$4]*([.F12]/100)/[$Settings.$B$4]+[$Settings.$D$4]/[.B12]+[$Settings.$D$4]*([.F12]/100)/[.C12])*1000+[$Settings.$C$4]" office:value-type="float" office:value="336.441757043166" calcext:value-type="float">
            <text:p>336,44</text:p>
          </table:table-cell>
        </table:table-row>
        <table:table-row table:style-name="ro1" table:visibility="collapse">
          <table:table-cell office:value-type="string" calcext:value-type="string">
            <text:p>zlib 1.3.1 -8</text:p>
          </table:table-cell>
          <table:table-cell office:value-type="float" office:value="22.15" calcext:value-type="float">
            <text:p>22,15</text:p>
          </table:table-cell>
          <table:table-cell office:value-type="float" office:value="499.57" calcext:value-type="float">
            <text:p>499,57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2073703" calcext:value-type="float">
            <text:p>12073703</text:p>
          </table:table-cell>
          <table:table-cell office:value-type="float" office:value="29.12" calcext:value-type="float">
            <text:p>29,12</text:p>
          </table:table-cell>
          <table:table-cell office:value-type="string" calcext:value-type="string">
            <text:p>webster</text:p>
          </table:table-cell>
          <table:table-cell table:formula="of:=([$Settings.$D$4]*([.F13]/100)/[$Settings.$B$4]+[$Settings.$D$4]/[.B13]+[$Settings.$D$4]*([.F13]/100)/[.C13])*1000+[$Settings.$C$4]" office:value-type="float" office:value="346.929628157416" calcext:value-type="float">
            <text:p>346,93</text:p>
          </table:table-cell>
        </table:table-row>
        <table:table-row table:style-name="ro1" table:visibility="collapse">
          <table:table-cell office:value-type="string" calcext:value-type="string">
            <text:p>zlib 1.3.1 -9</text:p>
          </table:table-cell>
          <table:table-cell office:value-type="float" office:value="22.35" calcext:value-type="float">
            <text:p>22,35</text:p>
          </table:table-cell>
          <table:table-cell office:value-type="float" office:value="498.03" calcext:value-type="float">
            <text:p>498,03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2073475" calcext:value-type="float">
            <text:p>12073475</text:p>
          </table:table-cell>
          <table:table-cell office:value-type="float" office:value="29.12" calcext:value-type="float">
            <text:p>29,12</text:p>
          </table:table-cell>
          <table:table-cell office:value-type="string" calcext:value-type="string">
            <text:p>webster</text:p>
          </table:table-cell>
          <table:table-cell table:formula="of:=([$Settings.$D$4]*([.F14]/100)/[$Settings.$B$4]+[$Settings.$D$4]/[.B14]+[$Settings.$D$4]*([.F14]/100)/[.C14])*1000+[$Settings.$C$4]" office:value-type="float" office:value="346.527433039195" calcext:value-type="float">
            <text:p>346,53</text:p>
          </table:table-cell>
        </table:table-row>
        <table:table-row table:style-name="ro1">
          <table:table-cell office:value-type="string" calcext:value-type="string">
            <text:p>brotli 1.2.0 -0</text:p>
          </table:table-cell>
          <table:table-cell office:value-type="float" office:value="390.89" calcext:value-type="float">
            <text:p>390,89</text:p>
          </table:table-cell>
          <table:table-cell office:value-type="float" office:value="477.73" calcext:value-type="float">
            <text:p>477,73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4559362" calcext:value-type="float">
            <text:p>14559362</text:p>
          </table:table-cell>
          <table:table-cell office:value-type="float" office:value="35.12" calcext:value-type="float">
            <text:p>35,12</text:p>
          </table:table-cell>
          <table:table-cell office:value-type="string" calcext:value-type="string">
            <text:p>webster</text:p>
          </table:table-cell>
          <table:table-cell table:formula="of:=([$Settings.$D$4]*([.F15]/100)/[$Settings.$B$4]+[$Settings.$D$4]/[.B15]+[$Settings.$D$4]*([.F15]/100)/[.C15])*1000+[$Settings.$C$4]" office:value-type="float" office:value="364.493407755151" calcext:value-type="float">
            <text:p>364,49</text:p>
          </table:table-cell>
        </table:table-row>
        <table:table-row table:style-name="ro1">
          <table:table-cell office:value-type="string" calcext:value-type="string">
            <text:p>brotli 1.2.0 -1</text:p>
          </table:table-cell>
          <table:table-cell office:value-type="float" office:value="261.08" calcext:value-type="float">
            <text:p>261,08</text:p>
          </table:table-cell>
          <table:table-cell office:value-type="float" office:value="500.91" calcext:value-type="float">
            <text:p>500,91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3462028" calcext:value-type="float">
            <text:p>13462028</text:p>
          </table:table-cell>
          <table:table-cell office:value-type="float" office:value="32.47" calcext:value-type="float">
            <text:p>32,47</text:p>
          </table:table-cell>
          <table:table-cell office:value-type="string" calcext:value-type="string">
            <text:p>webster</text:p>
          </table:table-cell>
          <table:table-cell table:formula="of:=([$Settings.$D$4]*([.F16]/100)/[$Settings.$B$4]+[$Settings.$D$4]/[.B16]+[$Settings.$D$4]*([.F16]/100)/[.C16])*1000+[$Settings.$C$4]" office:value-type="float" office:value="339.178463842658" calcext:value-type="float">
            <text:p>339,18</text:p>
          </table:table-cell>
        </table:table-row>
        <table:table-row table:style-name="ro1">
          <table:table-cell office:value-type="string" calcext:value-type="string">
            <text:p>brotli 1.2.0 -2</text:p>
          </table:table-cell>
          <table:table-cell office:value-type="float" office:value="159.45" calcext:value-type="float">
            <text:p>159,45</text:p>
          </table:table-cell>
          <table:table-cell office:value-type="float" office:value="577.52" calcext:value-type="float">
            <text:p>577,52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2659457" calcext:value-type="float">
            <text:p>12659457</text:p>
          </table:table-cell>
          <table:table-cell office:value-type="float" office:value="30.54" calcext:value-type="float">
            <text:p>30,54</text:p>
          </table:table-cell>
          <table:table-cell office:value-type="string" calcext:value-type="string">
            <text:p>webster</text:p>
          </table:table-cell>
          <table:table-cell table:formula="of:=([$Settings.$D$4]*([.F17]/100)/[$Settings.$B$4]+[$Settings.$D$4]/[.B17]+[$Settings.$D$4]*([.F17]/100)/[.C17])*1000+[$Settings.$C$4]" office:value-type="float" office:value="322.200371337249" calcext:value-type="float">
            <text:p>322,20</text:p>
          </table:table-cell>
        </table:table-row>
        <table:table-row table:style-name="ro1">
          <table:table-cell office:value-type="string" calcext:value-type="string">
            <text:p>brotli 1.2.0 -3</text:p>
          </table:table-cell>
          <table:table-cell office:value-type="float" office:value="134.31" calcext:value-type="float">
            <text:p>134,31</text:p>
          </table:table-cell>
          <table:table-cell office:value-type="float" office:value="591.11" calcext:value-type="float">
            <text:p>591,11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2415034" calcext:value-type="float">
            <text:p>12415034</text:p>
          </table:table-cell>
          <table:table-cell office:value-type="float" office:value="29.95" calcext:value-type="float">
            <text:p>29,95</text:p>
          </table:table-cell>
          <table:table-cell office:value-type="string" calcext:value-type="string">
            <text:p>webster</text:p>
          </table:table-cell>
          <table:table-cell table:formula="of:=([$Settings.$D$4]*([.F18]/100)/[$Settings.$B$4]+[$Settings.$D$4]/[.B18]+[$Settings.$D$4]*([.F18]/100)/[.C18])*1000+[$Settings.$C$4]" office:value-type="float" office:value="317.452135875642" calcext:value-type="float">
            <text:p>317,45</text:p>
          </table:table-cell>
        </table:table-row>
        <table:table-row table:style-name="ro1">
          <table:table-cell office:value-type="string" calcext:value-type="string">
            <text:p>brotli 1.2.0 -4</text:p>
          </table:table-cell>
          <table:table-cell office:value-type="float" office:value="96.7" calcext:value-type="float">
            <text:p>96,70</text:p>
          </table:table-cell>
          <table:table-cell office:value-type="float" office:value="710.89" calcext:value-type="float">
            <text:p>710,89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0991211" calcext:value-type="float">
            <text:p>10991211</text:p>
          </table:table-cell>
          <table:table-cell office:value-type="float" office:value="26.51" calcext:value-type="float">
            <text:p>26,51</text:p>
          </table:table-cell>
          <table:table-cell office:value-type="string" calcext:value-type="string">
            <text:p>webster</text:p>
          </table:table-cell>
          <table:table-cell table:formula="of:=([$Settings.$D$4]*([.F19]/100)/[$Settings.$B$4]+[$Settings.$D$4]/[.B19]+[$Settings.$D$4]*([.F19]/100)/[.C19])*1000+[$Settings.$C$4]" office:value-type="float" office:value="285.814174461502" calcext:value-type="float">
            <text:p>285,81</text:p>
          </table:table-cell>
        </table:table-row>
        <table:table-row table:style-name="ro1">
          <table:table-cell office:value-type="string" calcext:value-type="string">
            <text:p>brotli 1.2.0 -5</text:p>
          </table:table-cell>
          <table:table-cell office:value-type="float" office:value="64.6" calcext:value-type="float">
            <text:p>64,60</text:p>
          </table:table-cell>
          <table:table-cell office:value-type="float" office:value="722.73" calcext:value-type="float">
            <text:p>722,73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0600177" calcext:value-type="float">
            <text:p>10600177</text:p>
          </table:table-cell>
          <table:table-cell office:value-type="float" office:value="25.57" calcext:value-type="float">
            <text:p>25,57</text:p>
          </table:table-cell>
          <table:table-cell office:value-type="string" calcext:value-type="string">
            <text:p>webster</text:p>
          </table:table-cell>
          <table:table-cell table:formula="of:=([$Settings.$D$4]*([.F20]/100)/[$Settings.$B$4]+[$Settings.$D$4]/[.B20]+[$Settings.$D$4]*([.F20]/100)/[.C20])*1000+[$Settings.$C$4]" office:value-type="float" office:value="281.533673568045" calcext:value-type="float">
            <text:p>281,53</text:p>
          </table:table-cell>
        </table:table-row>
        <table:table-row table:style-name="ro1">
          <table:table-cell office:value-type="string" calcext:value-type="string">
            <text:p>brotli 1.2.0 -6</text:p>
          </table:table-cell>
          <table:table-cell office:value-type="float" office:value="51.59" calcext:value-type="float">
            <text:p>51,59</text:p>
          </table:table-cell>
          <table:table-cell office:value-type="float" office:value="750.83" calcext:value-type="float">
            <text:p>750,83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0286606" calcext:value-type="float">
            <text:p>10286606</text:p>
          </table:table-cell>
          <table:table-cell office:value-type="float" office:value="24.81" calcext:value-type="float">
            <text:p>24,81</text:p>
          </table:table-cell>
          <table:table-cell office:value-type="string" calcext:value-type="string">
            <text:p>webster</text:p>
          </table:table-cell>
          <table:table-cell table:formula="of:=([$Settings.$D$4]*([.F21]/100)/[$Settings.$B$4]+[$Settings.$D$4]/[.B21]+[$Settings.$D$4]*([.F21]/100)/[.C21])*1000+[$Settings.$C$4]" office:value-type="float" office:value="277.814035792507" calcext:value-type="float">
            <text:p>277,81</text:p>
          </table:table-cell>
        </table:table-row>
        <table:table-row table:style-name="ro1" table:visibility="collapse">
          <table:table-cell office:value-type="string" calcext:value-type="string">
            <text:p>brotli 1.2.0 -7</text:p>
          </table:table-cell>
          <table:table-cell office:value-type="float" office:value="32.91" calcext:value-type="float">
            <text:p>32,91</text:p>
          </table:table-cell>
          <table:table-cell office:value-type="float" office:value="767.46" calcext:value-type="float">
            <text:p>767,46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0026184" calcext:value-type="float">
            <text:p>10026184</text:p>
          </table:table-cell>
          <table:table-cell office:value-type="float" office:value="24.18" calcext:value-type="float">
            <text:p>24,18</text:p>
          </table:table-cell>
          <table:table-cell office:value-type="string" calcext:value-type="string">
            <text:p>webster</text:p>
          </table:table-cell>
          <table:table-cell table:formula="of:=([$Settings.$D$4]*([.F22]/100)/[$Settings.$B$4]+[$Settings.$D$4]/[.B22]+[$Settings.$D$4]*([.F22]/100)/[.C22])*1000+[$Settings.$C$4]" office:value-type="float" office:value="282.500966222238" calcext:value-type="float">
            <text:p>282,50</text:p>
          </table:table-cell>
        </table:table-row>
        <table:table-row table:style-name="ro1" table:visibility="collapse">
          <table:table-cell office:value-type="string" calcext:value-type="string">
            <text:p>brotli 1.2.0 -8</text:p>
          </table:table-cell>
          <table:table-cell office:value-type="float" office:value="23.35" calcext:value-type="float">
            <text:p>23,35</text:p>
          </table:table-cell>
          <table:table-cell office:value-type="float" office:value="783.15" calcext:value-type="float">
            <text:p>783,15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9842279" calcext:value-type="float">
            <text:p>9842279</text:p>
          </table:table-cell>
          <table:table-cell office:value-type="float" office:value="23.74" calcext:value-type="float">
            <text:p>23,74</text:p>
          </table:table-cell>
          <table:table-cell office:value-type="string" calcext:value-type="string">
            <text:p>webster</text:p>
          </table:table-cell>
          <table:table-cell table:formula="of:=([$Settings.$D$4]*([.F23]/100)/[$Settings.$B$4]+[$Settings.$D$4]/[.B23]+[$Settings.$D$4]*([.F23]/100)/[.C23])*1000+[$Settings.$C$4]" office:value-type="float" office:value="290.529687238751" calcext:value-type="float">
            <text:p>290,53</text:p>
          </table:table-cell>
        </table:table-row>
        <table:table-row table:style-name="ro1" table:visibility="collapse">
          <table:table-cell office:value-type="string" calcext:value-type="string">
            <text:p>brotli 1.2.0 -9</text:p>
          </table:table-cell>
          <table:table-cell office:value-type="float" office:value="16.98" calcext:value-type="float">
            <text:p>16,98</text:p>
          </table:table-cell>
          <table:table-cell office:value-type="float" office:value="783.95" calcext:value-type="float">
            <text:p>783,95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9710099" calcext:value-type="float">
            <text:p>9710099</text:p>
          </table:table-cell>
          <table:table-cell office:value-type="float" office:value="23.42" calcext:value-type="float">
            <text:p>23,42</text:p>
          </table:table-cell>
          <table:table-cell office:value-type="string" calcext:value-type="string">
            <text:p>webster</text:p>
          </table:table-cell>
          <table:table-cell table:formula="of:=([$Settings.$D$4]*([.F24]/100)/[$Settings.$B$4]+[$Settings.$D$4]/[.B24]+[$Settings.$D$4]*([.F24]/100)/[.C24])*1000+[$Settings.$C$4]" office:value-type="float" office:value="303.391558618878" calcext:value-type="float">
            <text:p>303,39</text:p>
          </table:table-cell>
        </table:table-row>
        <table:table-row table:style-name="ro1" table:visibility="collapse">
          <table:table-cell office:value-type="string" calcext:value-type="string">
            <text:p>brotli 1.2.0 -10</text:p>
          </table:table-cell>
          <table:table-cell office:value-type="float" office:value="2.01" calcext:value-type="float">
            <text:p>2,01</text:p>
          </table:table-cell>
          <table:table-cell office:value-type="float" office:value="667.99" calcext:value-type="float">
            <text:p>667,99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8925025" calcext:value-type="float">
            <text:p>8925025</text:p>
          </table:table-cell>
          <table:table-cell office:value-type="float" office:value="21.53" calcext:value-type="float">
            <text:p>21,53</text:p>
          </table:table-cell>
          <table:table-cell office:value-type="string" calcext:value-type="string">
            <text:p>webster</text:p>
          </table:table-cell>
          <table:table-cell table:formula="of:=([$Settings.$D$4]*([.F25]/100)/[$Settings.$B$4]+[$Settings.$D$4]/[.B25]+[$Settings.$D$4]*([.F25]/100)/[.C25])*1000+[$Settings.$C$4]" office:value-type="float" office:value="723.13474802517" calcext:value-type="float">
            <text:p>723,13</text:p>
          </table:table-cell>
        </table:table-row>
        <table:table-row table:style-name="ro1" table:visibility="collapse">
          <table:table-cell office:value-type="string" calcext:value-type="string">
            <text:p>brotli 1.2.0 -11</text:p>
          </table:table-cell>
          <table:table-cell office:value-type="float" office:value="0.86" calcext:value-type="float">
            <text:p>0,86</text:p>
          </table:table-cell>
          <table:table-cell office:value-type="float" office:value="780.11" calcext:value-type="float">
            <text:p>780,11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8788887" calcext:value-type="float">
            <text:p>8788887</text:p>
          </table:table-cell>
          <table:table-cell office:value-type="float" office:value="21.2" calcext:value-type="float">
            <text:p>21,20</text:p>
          </table:table-cell>
          <table:table-cell office:value-type="string" calcext:value-type="string">
            <text:p>webster</text:p>
          </table:table-cell>
          <table:table-cell table:formula="of:=([$Settings.$D$4]*([.F26]/100)/[$Settings.$B$4]+[$Settings.$D$4]/[.B26]+[$Settings.$D$4]*([.F26]/100)/[.C26])*1000+[$Settings.$C$4]" office:value-type="float" office:value="1385.06245422157" calcext:value-type="float">
            <text:p>1385,06</text:p>
          </table:table-cell>
        </table:table-row>
        <table:table-row table:style-name="ro1">
          <table:table-cell office:value-type="string" calcext:value-type="string">
            <text:p>zstd 1.5.7 -1</text:p>
          </table:table-cell>
          <table:table-cell office:value-type="float" office:value="461.38" calcext:value-type="float">
            <text:p>461,38</text:p>
          </table:table-cell>
          <table:table-cell office:value-type="float" office:value="1741.48" calcext:value-type="float">
            <text:p>1 741,48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3661986" calcext:value-type="float">
            <text:p>13661986</text:p>
          </table:table-cell>
          <table:table-cell office:value-type="float" office:value="32.95" calcext:value-type="float">
            <text:p>32,95</text:p>
          </table:table-cell>
          <table:table-cell office:value-type="string" calcext:value-type="string">
            <text:p>webster</text:p>
          </table:table-cell>
          <table:table-cell table:formula="of:=([$Settings.$D$4]*([.F27]/100)/[$Settings.$B$4]+[$Settings.$D$4]/[.B27]+[$Settings.$D$4]*([.F27]/100)/[.C27])*1000+[$Settings.$C$4]" office:value-type="float" office:value="341.856617692548" calcext:value-type="float">
            <text:p>341,86</text:p>
          </table:table-cell>
        </table:table-row>
        <table:table-row table:style-name="ro1">
          <table:table-cell office:value-type="string" calcext:value-type="string">
            <text:p>zstd 1.5.7 -2</text:p>
          </table:table-cell>
          <table:table-cell office:value-type="float" office:value="340.35" calcext:value-type="float">
            <text:p>340,35</text:p>
          </table:table-cell>
          <table:table-cell office:value-type="float" office:value="1487.24" calcext:value-type="float">
            <text:p>1 487,24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2807296" calcext:value-type="float">
            <text:p>12807296</text:p>
          </table:table-cell>
          <table:table-cell office:value-type="float" office:value="30.89" calcext:value-type="float">
            <text:p>30,89</text:p>
          </table:table-cell>
          <table:table-cell office:value-type="string" calcext:value-type="string">
            <text:p>webster</text:p>
          </table:table-cell>
          <table:table-cell table:formula="of:=([$Settings.$D$4]*([.F28]/100)/[$Settings.$B$4]+[$Settings.$D$4]/[.B28]+[$Settings.$D$4]*([.F28]/100)/[.C28])*1000+[$Settings.$C$4]" office:value-type="float" office:value="322.045852071895" calcext:value-type="float">
            <text:p>322,05</text:p>
          </table:table-cell>
        </table:table-row>
        <table:table-row table:style-name="ro1">
          <table:table-cell office:value-type="string" calcext:value-type="string">
            <text:p>zstd 1.5.7 -3</text:p>
          </table:table-cell>
          <table:table-cell office:value-type="float" office:value="256.96" calcext:value-type="float">
            <text:p>256,96</text:p>
          </table:table-cell>
          <table:table-cell office:value-type="float" office:value="1442.12" calcext:value-type="float">
            <text:p>1 442,12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2096850" calcext:value-type="float">
            <text:p>12096850</text:p>
          </table:table-cell>
          <table:table-cell office:value-type="float" office:value="29.18" calcext:value-type="float">
            <text:p>29,18</text:p>
          </table:table-cell>
          <table:table-cell office:value-type="string" calcext:value-type="string">
            <text:p>webster</text:p>
          </table:table-cell>
          <table:table-cell table:formula="of:=([$Settings.$D$4]*([.F29]/100)/[$Settings.$B$4]+[$Settings.$D$4]/[.B29]+[$Settings.$D$4]*([.F29]/100)/[.C29])*1000+[$Settings.$C$4]" office:value-type="float" office:value="305.893997286892" calcext:value-type="float">
            <text:p>305,89</text:p>
          </table:table-cell>
        </table:table-row>
        <table:table-row table:style-name="ro1">
          <table:table-cell office:value-type="string" calcext:value-type="string">
            <text:p>zstd 1.5.7 -4</text:p>
          </table:table-cell>
          <table:table-cell office:value-type="float" office:value="251.4" calcext:value-type="float">
            <text:p>251,40</text:p>
          </table:table-cell>
          <table:table-cell office:value-type="float" office:value="1408.85" calcext:value-type="float">
            <text:p>1 408,85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1905883" calcext:value-type="float">
            <text:p>11905883</text:p>
          </table:table-cell>
          <table:table-cell office:value-type="float" office:value="28.72" calcext:value-type="float">
            <text:p>28,72</text:p>
          </table:table-cell>
          <table:table-cell office:value-type="string" calcext:value-type="string">
            <text:p>webster</text:p>
          </table:table-cell>
          <table:table-cell table:formula="of:=([$Settings.$D$4]*([.F30]/100)/[$Settings.$B$4]+[$Settings.$D$4]/[.B30]+[$Settings.$D$4]*([.F30]/100)/[.C30])*1000+[$Settings.$C$4]" office:value-type="float" office:value="301.38157894878" calcext:value-type="float">
            <text:p>301,38</text:p>
          </table:table-cell>
        </table:table-row>
        <table:table-row table:style-name="ro1">
          <table:table-cell office:value-type="string" calcext:value-type="string">
            <text:p>zstd 1.5.7 -5</text:p>
          </table:table-cell>
          <table:table-cell office:value-type="float" office:value="155.57" calcext:value-type="float">
            <text:p>155,57</text:p>
          </table:table-cell>
          <table:table-cell office:value-type="float" office:value="1441.32" calcext:value-type="float">
            <text:p>1 441,32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1215495" calcext:value-type="float">
            <text:p>11215495</text:p>
          </table:table-cell>
          <table:table-cell office:value-type="float" office:value="27.05" calcext:value-type="float">
            <text:p>27,05</text:p>
          </table:table-cell>
          <table:table-cell office:value-type="string" calcext:value-type="string">
            <text:p>webster</text:p>
          </table:table-cell>
          <table:table-cell table:formula="of:=([$Settings.$D$4]*([.F31]/100)/[$Settings.$B$4]+[$Settings.$D$4]/[.B31]+[$Settings.$D$4]*([.F31]/100)/[.C31])*1000+[$Settings.$C$4]" office:value-type="float" office:value="287.115649731855" calcext:value-type="float">
            <text:p>287,12</text:p>
          </table:table-cell>
        </table:table-row>
        <table:table-row table:style-name="ro1">
          <table:table-cell office:value-type="string" calcext:value-type="string">
            <text:p>zstd 1.5.7 -6</text:p>
          </table:table-cell>
          <table:table-cell office:value-type="float" office:value="108.97" calcext:value-type="float">
            <text:p>108,97</text:p>
          </table:table-cell>
          <table:table-cell office:value-type="float" office:value="1562.15" calcext:value-type="float">
            <text:p>1 562,15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0807524" calcext:value-type="float">
            <text:p>10807524</text:p>
          </table:table-cell>
          <table:table-cell office:value-type="float" office:value="26.07" calcext:value-type="float">
            <text:p>26,07</text:p>
          </table:table-cell>
          <table:table-cell office:value-type="string" calcext:value-type="string">
            <text:p>webster</text:p>
          </table:table-cell>
          <table:table-cell table:formula="of:=([$Settings.$D$4]*([.F32]/100)/[$Settings.$B$4]+[$Settings.$D$4]/[.B32]+[$Settings.$D$4]*([.F32]/100)/[.C32])*1000+[$Settings.$C$4]" office:value-type="float" office:value="280.043723044067" calcext:value-type="float">
            <text:p>280,04</text:p>
          </table:table-cell>
        </table:table-row>
        <table:table-row table:style-name="ro1">
          <table:table-cell office:value-type="string" calcext:value-type="string">
            <text:p>zstd 1.5.7 -7</text:p>
          </table:table-cell>
          <table:table-cell office:value-type="float" office:value="94.76" calcext:value-type="float">
            <text:p>94,76</text:p>
          </table:table-cell>
          <table:table-cell office:value-type="float" office:value="1590.28" calcext:value-type="float">
            <text:p>1 590,28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0555960" calcext:value-type="float">
            <text:p>10555960</text:p>
          </table:table-cell>
          <table:table-cell office:value-type="float" office:value="25.46" calcext:value-type="float">
            <text:p>25,46</text:p>
          </table:table-cell>
          <table:table-cell office:value-type="string" calcext:value-type="string">
            <text:p>webster</text:p>
          </table:table-cell>
          <table:table-cell table:formula="of:=([$Settings.$D$4]*([.F33]/100)/[$Settings.$B$4]+[$Settings.$D$4]/[.B33]+[$Settings.$D$4]*([.F33]/100)/[.C33])*1000+[$Settings.$C$4]" office:value-type="float" office:value="275.313073532092" calcext:value-type="float">
            <text:p>275,31</text:p>
          </table:table-cell>
        </table:table-row>
        <table:table-row table:style-name="ro1">
          <table:table-cell office:value-type="string" calcext:value-type="string">
            <text:p>zstd 1.5.7 -8</text:p>
          </table:table-cell>
          <table:table-cell office:value-type="float" office:value="72.15" calcext:value-type="float">
            <text:p>72,15</text:p>
          </table:table-cell>
          <table:table-cell office:value-type="float" office:value="1665.88" calcext:value-type="float">
            <text:p>1 665,88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0416812" calcext:value-type="float">
            <text:p>10416812</text:p>
          </table:table-cell>
          <table:table-cell office:value-type="float" office:value="25.13" calcext:value-type="float">
            <text:p>25,13</text:p>
          </table:table-cell>
          <table:table-cell office:value-type="string" calcext:value-type="string">
            <text:p>webster</text:p>
          </table:table-cell>
          <table:table-cell table:formula="of:=([$Settings.$D$4]*([.F34]/100)/[$Settings.$B$4]+[$Settings.$D$4]/[.B34]+[$Settings.$D$4]*([.F34]/100)/[.C34])*1000+[$Settings.$C$4]" office:value-type="float" office:value="275.310865061781" calcext:value-type="float">
            <text:p>275,31</text:p>
          </table:table-cell>
        </table:table-row>
        <table:table-row table:style-name="ro1">
          <table:table-cell office:value-type="string" calcext:value-type="string">
            <text:p>zstd 1.5.7 -9</text:p>
          </table:table-cell>
          <table:table-cell office:value-type="float" office:value="68.14" calcext:value-type="float">
            <text:p>68,14</text:p>
          </table:table-cell>
          <table:table-cell office:value-type="float" office:value="1668.06" calcext:value-type="float">
            <text:p>1 668,06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0258407" calcext:value-type="float">
            <text:p>10258407</text:p>
          </table:table-cell>
          <table:table-cell office:value-type="float" office:value="24.74" calcext:value-type="float">
            <text:p>24,74</text:p>
          </table:table-cell>
          <table:table-cell office:value-type="string" calcext:value-type="string">
            <text:p>webster</text:p>
          </table:table-cell>
          <table:table-cell table:formula="of:=([$Settings.$D$4]*([.F35]/100)/[$Settings.$B$4]+[$Settings.$D$4]/[.B35]+[$Settings.$D$4]*([.F35]/100)/[.C35])*1000+[$Settings.$C$4]" office:value-type="float" office:value="272.2239837507" calcext:value-type="float">
            <text:p>272,22</text:p>
          </table:table-cell>
        </table:table-row>
        <table:table-row table:style-name="ro1" table:visibility="collapse">
          <table:table-cell office:value-type="string" calcext:value-type="string">
            <text:p>zstd 1.5.7 -10</text:p>
          </table:table-cell>
          <table:table-cell office:value-type="float" office:value="49.19" calcext:value-type="float">
            <text:p>49,19</text:p>
          </table:table-cell>
          <table:table-cell office:value-type="float" office:value="1697.94" calcext:value-type="float">
            <text:p>1 697,94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10057659" calcext:value-type="float">
            <text:p>10057659</text:p>
          </table:table-cell>
          <table:table-cell office:value-type="float" office:value="24.26" calcext:value-type="float">
            <text:p>24,26</text:p>
          </table:table-cell>
          <table:table-cell office:value-type="string" calcext:value-type="string">
            <text:p>webster</text:p>
          </table:table-cell>
          <table:table-cell table:formula="of:=([$Settings.$D$4]*([.F36]/100)/[$Settings.$B$4]+[$Settings.$D$4]/[.B36]+[$Settings.$D$4]*([.F36]/100)/[.C36])*1000+[$Settings.$C$4]" office:value-type="float" office:value="273.072214248842" calcext:value-type="float">
            <text:p>273,07</text:p>
          </table:table-cell>
        </table:table-row>
        <table:table-row table:style-name="ro1" table:visibility="collapse">
          <table:table-cell office:value-type="string" calcext:value-type="string">
            <text:p>zstd 1.5.7 -11</text:p>
          </table:table-cell>
          <table:table-cell office:value-type="float" office:value="33.73" calcext:value-type="float">
            <text:p>33,73</text:p>
          </table:table-cell>
          <table:table-cell office:value-type="float" office:value="1728.61" calcext:value-type="float">
            <text:p>1 728,61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9936352" calcext:value-type="float">
            <text:p>9936352</text:p>
          </table:table-cell>
          <table:table-cell office:value-type="float" office:value="23.97" calcext:value-type="float">
            <text:p>23,97</text:p>
          </table:table-cell>
          <table:table-cell office:value-type="string" calcext:value-type="string">
            <text:p>webster</text:p>
          </table:table-cell>
          <table:table-cell table:formula="of:=([$Settings.$D$4]*([.F37]/100)/[$Settings.$B$4]+[$Settings.$D$4]/[.B37]+[$Settings.$D$4]*([.F37]/100)/[.C37])*1000+[$Settings.$C$4]" office:value-type="float" office:value="279.485864667037" calcext:value-type="float">
            <text:p>279,49</text:p>
          </table:table-cell>
        </table:table-row>
        <table:table-row table:style-name="ro1" table:visibility="collapse">
          <table:table-cell office:value-type="string" calcext:value-type="string">
            <text:p>zstd 1.5.7 -12</text:p>
          </table:table-cell>
          <table:table-cell office:value-type="float" office:value="30.87" calcext:value-type="float">
            <text:p>30,87</text:p>
          </table:table-cell>
          <table:table-cell office:value-type="float" office:value="1727.13" calcext:value-type="float">
            <text:p>1 727,13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9917322" calcext:value-type="float">
            <text:p>9917322</text:p>
          </table:table-cell>
          <table:table-cell office:value-type="float" office:value="23.92" calcext:value-type="float">
            <text:p>23,92</text:p>
          </table:table-cell>
          <table:table-cell office:value-type="string" calcext:value-type="string">
            <text:p>webster</text:p>
          </table:table-cell>
          <table:table-cell table:formula="of:=([$Settings.$D$4]*([.F38]/100)/[$Settings.$B$4]+[$Settings.$D$4]/[.B38]+[$Settings.$D$4]*([.F38]/100)/[.C38])*1000+[$Settings.$C$4]" office:value-type="float" office:value="281.732405599571" calcext:value-type="float">
            <text:p>281,73</text:p>
          </table:table-cell>
        </table:table-row>
        <table:table-row table:style-name="ro1" table:visibility="collapse">
          <table:table-cell office:value-type="string" calcext:value-type="string">
            <text:p>zstd 1.5.7 -13</text:p>
          </table:table-cell>
          <table:table-cell office:value-type="float" office:value="12.44" calcext:value-type="float">
            <text:p>12,44</text:p>
          </table:table-cell>
          <table:table-cell office:value-type="float" office:value="1743.87" calcext:value-type="float">
            <text:p>1 743,87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9843780" calcext:value-type="float">
            <text:p>9843780</text:p>
          </table:table-cell>
          <table:table-cell office:value-type="float" office:value="23.74" calcext:value-type="float">
            <text:p>23,74</text:p>
          </table:table-cell>
          <table:table-cell office:value-type="string" calcext:value-type="string">
            <text:p>webster</text:p>
          </table:table-cell>
          <table:table-cell table:formula="of:=([$Settings.$D$4]*([.F39]/100)/[$Settings.$B$4]+[$Settings.$D$4]/[.B39]+[$Settings.$D$4]*([.F39]/100)/[.C39])*1000+[$Settings.$C$4]" office:value-type="float" office:value="327.921986090846" calcext:value-type="float">
            <text:p>327,92</text:p>
          </table:table-cell>
        </table:table-row>
        <table:table-row table:style-name="ro1" table:visibility="collapse">
          <table:table-cell office:value-type="string" calcext:value-type="string">
            <text:p>zstd 1.5.7 -14</text:p>
          </table:table-cell>
          <table:table-cell office:value-type="float" office:value="10.61" calcext:value-type="float">
            <text:p>10,61</text:p>
          </table:table-cell>
          <table:table-cell office:value-type="float" office:value="1771.26" calcext:value-type="float">
            <text:p>1 771,26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9698730" calcext:value-type="float">
            <text:p>9698730</text:p>
          </table:table-cell>
          <table:table-cell office:value-type="float" office:value="23.39" calcext:value-type="float">
            <text:p>23,39</text:p>
          </table:table-cell>
          <table:table-cell office:value-type="string" calcext:value-type="string">
            <text:p>webster</text:p>
          </table:table-cell>
          <table:table-cell table:formula="of:=([$Settings.$D$4]*([.F40]/100)/[$Settings.$B$4]+[$Settings.$D$4]/[.B40]+[$Settings.$D$4]*([.F40]/100)/[.C40])*1000+[$Settings.$C$4]" office:value-type="float" office:value="338.282759769206" calcext:value-type="float">
            <text:p>338,28</text:p>
          </table:table-cell>
        </table:table-row>
        <table:table-row table:style-name="ro1" table:visibility="collapse">
          <table:table-cell office:value-type="string" calcext:value-type="string">
            <text:p>zstd 1.5.7 -15</text:p>
          </table:table-cell>
          <table:table-cell office:value-type="float" office:value="6.92" calcext:value-type="float">
            <text:p>6,92</text:p>
          </table:table-cell>
          <table:table-cell office:value-type="float" office:value="1768.72" calcext:value-type="float">
            <text:p>1 768,72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9552948" calcext:value-type="float">
            <text:p>9552948</text:p>
          </table:table-cell>
          <table:table-cell office:value-type="float" office:value="23.04" calcext:value-type="float">
            <text:p>23,04</text:p>
          </table:table-cell>
          <table:table-cell office:value-type="string" calcext:value-type="string">
            <text:p>webster</text:p>
          </table:table-cell>
          <table:table-cell table:formula="of:=([$Settings.$D$4]*([.F41]/100)/[$Settings.$B$4]+[$Settings.$D$4]/[.B41]+[$Settings.$D$4]*([.F41]/100)/[.C41])*1000+[$Settings.$C$4]" office:value-type="float" office:value="385.03893421375" calcext:value-type="float">
            <text:p>385,04</text:p>
          </table:table-cell>
        </table:table-row>
        <table:table-row table:style-name="ro1" table:visibility="collapse">
          <table:table-cell office:value-type="string" calcext:value-type="string">
            <text:p>zstd 1.5.7 -16</text:p>
          </table:table-cell>
          <table:table-cell office:value-type="float" office:value="5.83" calcext:value-type="float">
            <text:p>5,83</text:p>
          </table:table-cell>
          <table:table-cell office:value-type="float" office:value="1718.46" calcext:value-type="float">
            <text:p>1 718,46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9163058" calcext:value-type="float">
            <text:p>9163058</text:p>
          </table:table-cell>
          <table:table-cell office:value-type="float" office:value="22.1" calcext:value-type="float">
            <text:p>22,10</text:p>
          </table:table-cell>
          <table:table-cell office:value-type="string" calcext:value-type="string">
            <text:p>webster</text:p>
          </table:table-cell>
          <table:table-cell table:formula="of:=([$Settings.$D$4]*([.F42]/100)/[$Settings.$B$4]+[$Settings.$D$4]/[.B42]+[$Settings.$D$4]*([.F42]/100)/[.C42])*1000+[$Settings.$C$4]" office:value-type="float" office:value="402.655190138029" calcext:value-type="float">
            <text:p>402,66</text:p>
          </table:table-cell>
        </table:table-row>
        <table:table-row table:style-name="ro1" table:visibility="collapse">
          <table:table-cell office:value-type="string" calcext:value-type="string">
            <text:p>zstd 1.5.7 -17</text:p>
          </table:table-cell>
          <table:table-cell office:value-type="float" office:value="4.24" calcext:value-type="float">
            <text:p>4,24</text:p>
          </table:table-cell>
          <table:table-cell office:value-type="float" office:value="1715.33" calcext:value-type="float">
            <text:p>1 715,33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8930793" calcext:value-type="float">
            <text:p>8930793</text:p>
          </table:table-cell>
          <table:table-cell office:value-type="float" office:value="21.54" calcext:value-type="float">
            <text:p>21,54</text:p>
          </table:table-cell>
          <table:table-cell office:value-type="string" calcext:value-type="string">
            <text:p>webster</text:p>
          </table:table-cell>
          <table:table-cell table:formula="of:=([$Settings.$D$4]*([.F43]/100)/[$Settings.$B$4]+[$Settings.$D$4]/[.B43]+[$Settings.$D$4]*([.F43]/100)/[.C43])*1000+[$Settings.$C$4]" office:value-type="float" office:value="461.37463010858" calcext:value-type="float">
            <text:p>461,37</text:p>
          </table:table-cell>
        </table:table-row>
        <table:table-row table:style-name="ro1" table:visibility="collapse">
          <table:table-cell office:value-type="string" calcext:value-type="string">
            <text:p>zstd 1.5.7 -18</text:p>
          </table:table-cell>
          <table:table-cell office:value-type="float" office:value="3.16" calcext:value-type="float">
            <text:p>3,16</text:p>
          </table:table-cell>
          <table:table-cell office:value-type="float" office:value="1698.01" calcext:value-type="float">
            <text:p>1 698,01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8802422" calcext:value-type="float">
            <text:p>8802422</text:p>
          </table:table-cell>
          <table:table-cell office:value-type="float" office:value="21.23" calcext:value-type="float">
            <text:p>21,23</text:p>
          </table:table-cell>
          <table:table-cell office:value-type="string" calcext:value-type="string">
            <text:p>webster</text:p>
          </table:table-cell>
          <table:table-cell table:formula="of:=([$Settings.$D$4]*([.F44]/100)/[$Settings.$B$4]+[$Settings.$D$4]/[.B44]+[$Settings.$D$4]*([.F44]/100)/[.C44])*1000+[$Settings.$C$4]" office:value-type="float" office:value="538.88072491261" calcext:value-type="float">
            <text:p>538,88</text:p>
          </table:table-cell>
        </table:table-row>
        <table:table-row table:style-name="ro1" table:visibility="collapse">
          <table:table-cell office:value-type="string" calcext:value-type="string">
            <text:p>zstd 1.5.7 -19</text:p>
          </table:table-cell>
          <table:table-cell office:value-type="float" office:value="2.79" calcext:value-type="float">
            <text:p>2,79</text:p>
          </table:table-cell>
          <table:table-cell office:value-type="float" office:value="1677.18" calcext:value-type="float">
            <text:p>1 677,18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8679359" calcext:value-type="float">
            <text:p>8679359</text:p>
          </table:table-cell>
          <table:table-cell office:value-type="float" office:value="20.93" calcext:value-type="float">
            <text:p>20,93</text:p>
          </table:table-cell>
          <table:table-cell office:value-type="string" calcext:value-type="string">
            <text:p>webster</text:p>
          </table:table-cell>
          <table:table-cell table:formula="of:=([$Settings.$D$4]*([.F45]/100)/[$Settings.$B$4]+[$Settings.$D$4]/[.B45]+[$Settings.$D$4]*([.F45]/100)/[.C45])*1000+[$Settings.$C$4]" office:value-type="float" office:value="577.847731875074" calcext:value-type="float">
            <text:p>577,85</text:p>
          </table:table-cell>
        </table:table-row>
        <table:table-row table:style-name="ro1" table:visibility="collapse">
          <table:table-cell office:value-type="string" calcext:value-type="string">
            <text:p>zstd 1.5.7 -20</text:p>
          </table:table-cell>
          <table:table-cell office:value-type="float" office:value="2.35" calcext:value-type="float">
            <text:p>2,35</text:p>
          </table:table-cell>
          <table:table-cell office:value-type="float" office:value="1397.29" calcext:value-type="float">
            <text:p>1 397,29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8479544" calcext:value-type="float">
            <text:p>8479544</text:p>
          </table:table-cell>
          <table:table-cell office:value-type="float" office:value="20.45" calcext:value-type="float">
            <text:p>20,45</text:p>
          </table:table-cell>
          <table:table-cell office:value-type="string" calcext:value-type="string">
            <text:p>webster</text:p>
          </table:table-cell>
          <table:table-cell table:formula="of:=([$Settings.$D$4]*([.F46]/100)/[$Settings.$B$4]+[$Settings.$D$4]/[.B46]+[$Settings.$D$4]*([.F46]/100)/[.C46])*1000+[$Settings.$C$4]" office:value-type="float" office:value="640.178269623129" calcext:value-type="float">
            <text:p>640,18</text:p>
          </table:table-cell>
        </table:table-row>
        <table:table-row table:style-name="ro1" table:visibility="collapse">
          <table:table-cell office:value-type="string" calcext:value-type="string">
            <text:p>zstd 1.5.7 -21</text:p>
          </table:table-cell>
          <table:table-cell office:value-type="float" office:value="2.27" calcext:value-type="float">
            <text:p>2,27</text:p>
          </table:table-cell>
          <table:table-cell office:value-type="float" office:value="1407.57" calcext:value-type="float">
            <text:p>1 407,57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8433735" calcext:value-type="float">
            <text:p>8433735</text:p>
          </table:table-cell>
          <table:table-cell office:value-type="float" office:value="20.34" calcext:value-type="float">
            <text:p>20,34</text:p>
          </table:table-cell>
          <table:table-cell office:value-type="string" calcext:value-type="string">
            <text:p>webster</text:p>
          </table:table-cell>
          <table:table-cell table:formula="of:=([$Settings.$D$4]*([.F47]/100)/[$Settings.$B$4]+[$Settings.$D$4]/[.B47]+[$Settings.$D$4]*([.F47]/100)/[.C47])*1000+[$Settings.$C$4]" office:value-type="float" office:value="654.073138719809" calcext:value-type="float">
            <text:p>654,07</text:p>
          </table:table-cell>
        </table:table-row>
        <table:table-row table:style-name="ro1" table:visibility="collapse">
          <table:table-cell office:value-type="string" calcext:value-type="string">
            <text:p>zstd 1.5.7 -22</text:p>
          </table:table-cell>
          <table:table-cell office:value-type="float" office:value="2.2" calcext:value-type="float">
            <text:p>2,20</text:p>
          </table:table-cell>
          <table:table-cell office:value-type="float" office:value="1384.54" calcext:value-type="float">
            <text:p>1 384,54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8431509" calcext:value-type="float">
            <text:p>8431509</text:p>
          </table:table-cell>
          <table:table-cell office:value-type="float" office:value="20.34" calcext:value-type="float">
            <text:p>20,34</text:p>
          </table:table-cell>
          <table:table-cell office:value-type="string" calcext:value-type="string">
            <text:p>webster</text:p>
          </table:table-cell>
          <table:table-cell table:formula="of:=([$Settings.$D$4]*([.F48]/100)/[$Settings.$B$4]+[$Settings.$D$4]/[.B48]+[$Settings.$D$4]*([.F48]/100)/[.C48])*1000+[$Settings.$C$4]" office:value-type="float" office:value="668.092362543779" calcext:value-type="float">
            <text:p>668,09</text:p>
          </table:table-cell>
        </table:table-row>
      </table:table>
      <table:table table:name="CS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13" table:default-cell-style-name="ce5"/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./lzbench -o4 -ezlib/brotli/zstd 1.css</text:p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style-name="ce2" office:value-type="string" calcext:value-type="string">
            <text:p>Compressor name/level</text:p>
          </table:table-cell>
          <table:table-cell table:style-name="ce2" office:value-type="string" calcext:value-type="string">
            <text:p>Compression speed (MB/s)</text:p>
          </table:table-cell>
          <table:table-cell table:style-name="ce2" office:value-type="string" calcext:value-type="string">
            <text:p>Decompression speed (MB/s)</text:p>
          </table:table-cell>
          <table:table-cell table:style-name="ce2" office:value-type="string" calcext:value-type="string">
            <text:p>Original size (B)</text:p>
          </table:table-cell>
          <table:table-cell table:style-name="ce2" office:value-type="string" calcext:value-type="string">
            <text:p>Compressed size (B)</text:p>
          </table:table-cell>
          <table:table-cell table:style-name="ce2" office:value-type="string" calcext:value-type="string">
            <text:p>Ratio (%)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Total time (ms)</text:p>
          </table:table-cell>
        </table:table-row>
        <table:table-row table:style-name="ro1">
          <table:table-cell office:value-type="string" calcext:value-type="string">
            <text:p>zlib 1.3.1 -1</text:p>
          </table:table-cell>
          <table:table-cell office:value-type="float" office:value="101.35" calcext:value-type="float">
            <text:p>101,35</text:p>
          </table:table-cell>
          <table:table-cell office:value-type="float" office:value="507.15" calcext:value-type="float">
            <text:p>507,15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403361" calcext:value-type="float">
            <text:p>403361</text:p>
          </table:table-cell>
          <table:table-cell office:value-type="float" office:value="39.58" calcext:value-type="float">
            <text:p>39,58</text:p>
          </table:table-cell>
          <table:table-cell office:value-type="string" calcext:value-type="string">
            <text:p>1.css</text:p>
          </table:table-cell>
          <table:table-cell table:formula="of:=([$Settings.$D$4]*([.F6]/100)/[$Settings.$B$4]+[$Settings.$D$4]/[.B6]+[$Settings.$D$4]*([.F6]/100)/[.C6])*1000+[$Settings.$C$4]" office:value-type="float" office:value="416.447237936093" calcext:value-type="float">
            <text:p>416,45</text:p>
          </table:table-cell>
        </table:table-row>
        <table:table-row table:style-name="ro1">
          <table:table-cell office:value-type="string" calcext:value-type="string">
            <text:p>zlib 1.3.1 -2</text:p>
          </table:table-cell>
          <table:table-cell office:value-type="float" office:value="97.59" calcext:value-type="float">
            <text:p>97,59</text:p>
          </table:table-cell>
          <table:table-cell office:value-type="float" office:value="516.27" calcext:value-type="float">
            <text:p>516,27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95779" calcext:value-type="float">
            <text:p>395779</text:p>
          </table:table-cell>
          <table:table-cell office:value-type="float" office:value="38.84" calcext:value-type="float">
            <text:p>38,84</text:p>
          </table:table-cell>
          <table:table-cell office:value-type="string" calcext:value-type="string">
            <text:p>1.css</text:p>
          </table:table-cell>
          <table:table-cell table:formula="of:=([$Settings.$D$4]*([.F7]/100)/[$Settings.$B$4]+[$Settings.$D$4]/[.B7]+[$Settings.$D$4]*([.F7]/100)/[.C7])*1000+[$Settings.$C$4]" office:value-type="float" office:value="409.39927105465" calcext:value-type="float">
            <text:p>409,40</text:p>
          </table:table-cell>
        </table:table-row>
        <table:table-row table:style-name="ro1">
          <table:table-cell office:value-type="string" calcext:value-type="string">
            <text:p>zlib 1.3.1 -3</text:p>
          </table:table-cell>
          <table:table-cell office:value-type="float" office:value="91.37" calcext:value-type="float">
            <text:p>91,37</text:p>
          </table:table-cell>
          <table:table-cell office:value-type="float" office:value="527.28" calcext:value-type="float">
            <text:p>527,28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90654" calcext:value-type="float">
            <text:p>390654</text:p>
          </table:table-cell>
          <table:table-cell office:value-type="float" office:value="38.33" calcext:value-type="float">
            <text:p>38,33</text:p>
          </table:table-cell>
          <table:table-cell office:value-type="string" calcext:value-type="string">
            <text:p>1.css</text:p>
          </table:table-cell>
          <table:table-cell table:formula="of:=([$Settings.$D$4]*([.F8]/100)/[$Settings.$B$4]+[$Settings.$D$4]/[.B8]+[$Settings.$D$4]*([.F8]/100)/[.C8])*1000+[$Settings.$C$4]" office:value-type="float" office:value="404.971449576697" calcext:value-type="float">
            <text:p>404,97</text:p>
          </table:table-cell>
        </table:table-row>
        <table:table-row table:style-name="ro1">
          <table:table-cell office:value-type="string" calcext:value-type="string">
            <text:p>zlib 1.3.1 -4</text:p>
          </table:table-cell>
          <table:table-cell office:value-type="float" office:value="75.97" calcext:value-type="float">
            <text:p>75,97</text:p>
          </table:table-cell>
          <table:table-cell office:value-type="float" office:value="590.57" calcext:value-type="float">
            <text:p>590,57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73136" calcext:value-type="float">
            <text:p>373136</text:p>
          </table:table-cell>
          <table:table-cell office:value-type="float" office:value="36.61" calcext:value-type="float">
            <text:p>36,61</text:p>
          </table:table-cell>
          <table:table-cell office:value-type="string" calcext:value-type="string">
            <text:p>1.css</text:p>
          </table:table-cell>
          <table:table-cell table:formula="of:=([$Settings.$D$4]*([.F9]/100)/[$Settings.$B$4]+[$Settings.$D$4]/[.B9]+[$Settings.$D$4]*([.F9]/100)/[.C9])*1000+[$Settings.$C$4]" office:value-type="float" office:value="389.883000272576" calcext:value-type="float">
            <text:p>389,88</text:p>
          </table:table-cell>
        </table:table-row>
        <table:table-row table:style-name="ro1">
          <table:table-cell office:value-type="string" calcext:value-type="string">
            <text:p>zlib 1.3.1 -5</text:p>
          </table:table-cell>
          <table:table-cell office:value-type="float" office:value="67.64" calcext:value-type="float">
            <text:p>67,64</text:p>
          </table:table-cell>
          <table:table-cell office:value-type="float" office:value="600.61" calcext:value-type="float">
            <text:p>600,61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66582" calcext:value-type="float">
            <text:p>366582</text:p>
          </table:table-cell>
          <table:table-cell office:value-type="float" office:value="35.97" calcext:value-type="float">
            <text:p>35,97</text:p>
          </table:table-cell>
          <table:table-cell office:value-type="string" calcext:value-type="string">
            <text:p>1.css</text:p>
          </table:table-cell>
          <table:table-cell table:formula="of:=([$Settings.$D$4]*([.F10]/100)/[$Settings.$B$4]+[$Settings.$D$4]/[.B10]+[$Settings.$D$4]*([.F10]/100)/[.C10])*1000+[$Settings.$C$4]" office:value-type="float" office:value="385.083042517064" calcext:value-type="float">
            <text:p>385,08</text:p>
          </table:table-cell>
        </table:table-row>
        <table:table-row table:style-name="ro1">
          <table:table-cell office:value-type="string" calcext:value-type="string">
            <text:p>zlib 1.3.1 -6</text:p>
          </table:table-cell>
          <table:table-cell office:value-type="float" office:value="56.54" calcext:value-type="float">
            <text:p>56,54</text:p>
          </table:table-cell>
          <table:table-cell office:value-type="float" office:value="608.52" calcext:value-type="float">
            <text:p>608,52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64188" calcext:value-type="float">
            <text:p>364188</text:p>
          </table:table-cell>
          <table:table-cell office:value-type="float" office:value="35.74" calcext:value-type="float">
            <text:p>35,74</text:p>
          </table:table-cell>
          <table:table-cell office:value-type="string" calcext:value-type="string">
            <text:p>1.css</text:p>
          </table:table-cell>
          <table:table-cell table:formula="of:=([$Settings.$D$4]*([.F11]/100)/[$Settings.$B$4]+[$Settings.$D$4]/[.B11]+[$Settings.$D$4]*([.F11]/100)/[.C11])*1000+[$Settings.$C$4]" office:value-type="float" office:value="385.673920190621" calcext:value-type="float">
            <text:p>385,67</text:p>
          </table:table-cell>
        </table:table-row>
        <table:table-row table:style-name="ro1">
          <table:table-cell office:value-type="string" calcext:value-type="string">
            <text:p>zlib 1.3.1 -7</text:p>
          </table:table-cell>
          <table:table-cell office:value-type="float" office:value="51.55" calcext:value-type="float">
            <text:p>51,55</text:p>
          </table:table-cell>
          <table:table-cell office:value-type="float" office:value="607.71" calcext:value-type="float">
            <text:p>607,71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63658" calcext:value-type="float">
            <text:p>363658</text:p>
          </table:table-cell>
          <table:table-cell office:value-type="float" office:value="35.68" calcext:value-type="float">
            <text:p>35,68</text:p>
          </table:table-cell>
          <table:table-cell office:value-type="string" calcext:value-type="string">
            <text:p>1.css</text:p>
          </table:table-cell>
          <table:table-cell table:formula="of:=([$Settings.$D$4]*([.F12]/100)/[$Settings.$B$4]+[$Settings.$D$4]/[.B12]+[$Settings.$D$4]*([.F12]/100)/[.C12])*1000+[$Settings.$C$4]" office:value-type="float" office:value="386.78576424213" calcext:value-type="float">
            <text:p>386,79</text:p>
          </table:table-cell>
        </table:table-row>
        <table:table-row table:style-name="ro1" table:visibility="collapse">
          <table:table-cell office:value-type="string" calcext:value-type="string">
            <text:p>zlib 1.3.1 -8</text:p>
          </table:table-cell>
          <table:table-cell office:value-type="float" office:value="44.51" calcext:value-type="float">
            <text:p>44,51</text:p>
          </table:table-cell>
          <table:table-cell office:value-type="float" office:value="608.58" calcext:value-type="float">
            <text:p>608,58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63469" calcext:value-type="float">
            <text:p>363469</text:p>
          </table:table-cell>
          <table:table-cell office:value-type="float" office:value="35.67" calcext:value-type="float">
            <text:p>35,67</text:p>
          </table:table-cell>
          <table:table-cell office:value-type="string" calcext:value-type="string">
            <text:p>1.css</text:p>
          </table:table-cell>
          <table:table-cell table:formula="of:=([$Settings.$D$4]*([.F13]/100)/[$Settings.$B$4]+[$Settings.$D$4]/[.B13]+[$Settings.$D$4]*([.F13]/100)/[.C13])*1000+[$Settings.$C$4]" office:value-type="float" office:value="389.752979884838" calcext:value-type="float">
            <text:p>389,75</text:p>
          </table:table-cell>
        </table:table-row>
        <table:table-row table:style-name="ro1" table:visibility="collapse">
          <table:table-cell office:value-type="string" calcext:value-type="string">
            <text:p>zlib 1.3.1 -9</text:p>
          </table:table-cell>
          <table:table-cell office:value-type="float" office:value="44.06" calcext:value-type="float">
            <text:p>44,06</text:p>
          </table:table-cell>
          <table:table-cell office:value-type="float" office:value="607.95" calcext:value-type="float">
            <text:p>607,95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63469" calcext:value-type="float">
            <text:p>363469</text:p>
          </table:table-cell>
          <table:table-cell office:value-type="float" office:value="35.67" calcext:value-type="float">
            <text:p>35,67</text:p>
          </table:table-cell>
          <table:table-cell office:value-type="string" calcext:value-type="string">
            <text:p>1.css</text:p>
          </table:table-cell>
          <table:table-cell table:formula="of:=([$Settings.$D$4]*([.F14]/100)/[$Settings.$B$4]+[$Settings.$D$4]/[.B14]+[$Settings.$D$4]*([.F14]/100)/[.C14])*1000+[$Settings.$C$4]" office:value-type="float" office:value="389.983049077705" calcext:value-type="float">
            <text:p>389,98</text:p>
          </table:table-cell>
        </table:table-row>
        <table:table-row table:style-name="ro1">
          <table:table-cell office:value-type="string" calcext:value-type="string">
            <text:p>brotli 1.2.0 -0</text:p>
          </table:table-cell>
          <table:table-cell office:value-type="float" office:value="648.31" calcext:value-type="float">
            <text:p>648,31</text:p>
          </table:table-cell>
          <table:table-cell office:value-type="float" office:value="694.81" calcext:value-type="float">
            <text:p>694,81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98559" calcext:value-type="float">
            <text:p>398559</text:p>
          </table:table-cell>
          <table:table-cell office:value-type="float" office:value="39.11" calcext:value-type="float">
            <text:p>39,11</text:p>
          </table:table-cell>
          <table:table-cell office:value-type="string" calcext:value-type="string">
            <text:p>1.css</text:p>
          </table:table-cell>
          <table:table-cell table:formula="of:=([$Settings.$D$4]*([.F15]/100)/[$Settings.$B$4]+[$Settings.$D$4]/[.B15]+[$Settings.$D$4]*([.F15]/100)/[.C15])*1000+[$Settings.$C$4]" office:value-type="float" office:value="403.205359661489" calcext:value-type="float">
            <text:p>403,21</text:p>
          </table:table-cell>
        </table:table-row>
        <table:table-row table:style-name="ro1">
          <table:table-cell office:value-type="string" calcext:value-type="string">
            <text:p>brotli 1.2.0 -1</text:p>
          </table:table-cell>
          <table:table-cell office:value-type="float" office:value="511.76" calcext:value-type="float">
            <text:p>511,76</text:p>
          </table:table-cell>
          <table:table-cell office:value-type="float" office:value="716.54" calcext:value-type="float">
            <text:p>716,54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83818" calcext:value-type="float">
            <text:p>383818</text:p>
          </table:table-cell>
          <table:table-cell office:value-type="float" office:value="37.66" calcext:value-type="float">
            <text:p>37,66</text:p>
          </table:table-cell>
          <table:table-cell office:value-type="string" calcext:value-type="string">
            <text:p>1.css</text:p>
          </table:table-cell>
          <table:table-cell table:formula="of:=([$Settings.$D$4]*([.F16]/100)/[$Settings.$B$4]+[$Settings.$D$4]/[.B16]+[$Settings.$D$4]*([.F16]/100)/[.C16])*1000+[$Settings.$C$4]" office:value-type="float" office:value="389.079622222224" calcext:value-type="float">
            <text:p>389,08</text:p>
          </table:table-cell>
        </table:table-row>
        <table:table-row table:style-name="ro1">
          <table:table-cell office:value-type="string" calcext:value-type="string">
            <text:p>brotli 1.2.0 -2</text:p>
          </table:table-cell>
          <table:table-cell office:value-type="float" office:value="295.42" calcext:value-type="float">
            <text:p>295,42</text:p>
          </table:table-cell>
          <table:table-cell office:value-type="float" office:value="734.87" calcext:value-type="float">
            <text:p>734,87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72722" calcext:value-type="float">
            <text:p>372722</text:p>
          </table:table-cell>
          <table:table-cell office:value-type="float" office:value="36.57" calcext:value-type="float">
            <text:p>36,57</text:p>
          </table:table-cell>
          <table:table-cell office:value-type="string" calcext:value-type="string">
            <text:p>1.css</text:p>
          </table:table-cell>
          <table:table-cell table:formula="of:=([$Settings.$D$4]*([.F17]/100)/[$Settings.$B$4]+[$Settings.$D$4]/[.B17]+[$Settings.$D$4]*([.F17]/100)/[.C17])*1000+[$Settings.$C$4]" office:value-type="float" office:value="379.582650208734" calcext:value-type="float">
            <text:p>379,58</text:p>
          </table:table-cell>
        </table:table-row>
        <table:table-row table:style-name="ro1">
          <table:table-cell office:value-type="string" calcext:value-type="string">
            <text:p>brotli 1.2.0 -3</text:p>
          </table:table-cell>
          <table:table-cell office:value-type="float" office:value="257.88" calcext:value-type="float">
            <text:p>257,88</text:p>
          </table:table-cell>
          <table:table-cell office:value-type="float" office:value="766.68" calcext:value-type="float">
            <text:p>766,68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67081" calcext:value-type="float">
            <text:p>367081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1.css</text:p>
          </table:table-cell>
          <table:table-cell table:formula="of:=([$Settings.$D$4]*([.F18]/100)/[$Settings.$B$4]+[$Settings.$D$4]/[.B18]+[$Settings.$D$4]*([.F18]/100)/[.C18])*1000+[$Settings.$C$4]" office:value-type="float" office:value="374.547590523625" calcext:value-type="float">
            <text:p>374,55</text:p>
          </table:table-cell>
        </table:table-row>
        <table:table-row table:style-name="ro1">
          <table:table-cell office:value-type="string" calcext:value-type="string">
            <text:p>brotli 1.2.0 -4</text:p>
          </table:table-cell>
          <table:table-cell office:value-type="float" office:value="192.31" calcext:value-type="float">
            <text:p>192,31</text:p>
          </table:table-cell>
          <table:table-cell office:value-type="float" office:value="801.25" calcext:value-type="float">
            <text:p>801,25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61454" calcext:value-type="float">
            <text:p>361454</text:p>
          </table:table-cell>
          <table:table-cell office:value-type="float" office:value="35.47" calcext:value-type="float">
            <text:p>35,47</text:p>
          </table:table-cell>
          <table:table-cell office:value-type="string" calcext:value-type="string">
            <text:p>1.css</text:p>
          </table:table-cell>
          <table:table-cell table:formula="of:=([$Settings.$D$4]*([.F19]/100)/[$Settings.$B$4]+[$Settings.$D$4]/[.B19]+[$Settings.$D$4]*([.F19]/100)/[.C19])*1000+[$Settings.$C$4]" office:value-type="float" office:value="370.342620908081" calcext:value-type="float">
            <text:p>370,34</text:p>
          </table:table-cell>
        </table:table-row>
        <table:table-row table:style-name="ro1">
          <table:table-cell office:value-type="string" calcext:value-type="string">
            <text:p>brotli 1.2.0 -5</text:p>
          </table:table-cell>
          <table:table-cell office:value-type="float" office:value="130.44" calcext:value-type="float">
            <text:p>130,44</text:p>
          </table:table-cell>
          <table:table-cell office:value-type="float" office:value="814.85" calcext:value-type="float">
            <text:p>814,85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53333" calcext:value-type="float">
            <text:p>353333</text:p>
          </table:table-cell>
          <table:table-cell office:value-type="float" office:value="34.67" calcext:value-type="float">
            <text:p>34,67</text:p>
          </table:table-cell>
          <table:table-cell office:value-type="string" calcext:value-type="string">
            <text:p>1.css</text:p>
          </table:table-cell>
          <table:table-cell table:formula="of:=([$Settings.$D$4]*([.F20]/100)/[$Settings.$B$4]+[$Settings.$D$4]/[.B20]+[$Settings.$D$4]*([.F20]/100)/[.C20])*1000+[$Settings.$C$4]" office:value-type="float" office:value="364.791837093938" calcext:value-type="float">
            <text:p>364,79</text:p>
          </table:table-cell>
        </table:table-row>
        <table:table-row table:style-name="ro1">
          <table:table-cell office:value-type="string" calcext:value-type="string">
            <text:p>brotli 1.2.0 -6</text:p>
          </table:table-cell>
          <table:table-cell office:value-type="float" office:value="115.28" calcext:value-type="float">
            <text:p>115,28</text:p>
          </table:table-cell>
          <table:table-cell office:value-type="float" office:value="826.24" calcext:value-type="float">
            <text:p>826,24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50907" calcext:value-type="float">
            <text:p>350907</text:p>
          </table:table-cell>
          <table:table-cell office:value-type="float" office:value="34.43" calcext:value-type="float">
            <text:p>34,43</text:p>
          </table:table-cell>
          <table:table-cell office:value-type="string" calcext:value-type="string">
            <text:p>1.css</text:p>
          </table:table-cell>
          <table:table-cell table:formula="of:=([$Settings.$D$4]*([.F21]/100)/[$Settings.$B$4]+[$Settings.$D$4]/[.B21]+[$Settings.$D$4]*([.F21]/100)/[.C21])*1000+[$Settings.$C$4]" office:value-type="float" office:value="363.391238585365" calcext:value-type="float">
            <text:p>363,39</text:p>
          </table:table-cell>
        </table:table-row>
        <table:table-row table:style-name="ro1">
          <table:table-cell office:value-type="string" calcext:value-type="string">
            <text:p>brotli 1.2.0 -7</text:p>
          </table:table-cell>
          <table:table-cell office:value-type="float" office:value="95.35" calcext:value-type="float">
            <text:p>95,35</text:p>
          </table:table-cell>
          <table:table-cell office:value-type="float" office:value="834.93" calcext:value-type="float">
            <text:p>834,93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8912" calcext:value-type="float">
            <text:p>348912</text:p>
          </table:table-cell>
          <table:table-cell office:value-type="float" office:value="34.24" calcext:value-type="float">
            <text:p>34,24</text:p>
          </table:table-cell>
          <table:table-cell office:value-type="string" calcext:value-type="string">
            <text:p>1.css</text:p>
          </table:table-cell>
          <table:table-cell table:formula="of:=([$Settings.$D$4]*([.F22]/100)/[$Settings.$B$4]+[$Settings.$D$4]/[.B22]+[$Settings.$D$4]*([.F22]/100)/[.C22])*1000+[$Settings.$C$4]" office:value-type="float" office:value="363.297771238948" calcext:value-type="float">
            <text:p>363,30</text:p>
          </table:table-cell>
        </table:table-row>
        <table:table-row table:style-name="ro1">
          <table:table-cell office:value-type="string" calcext:value-type="string">
            <text:p>brotli 1.2.0 -8</text:p>
          </table:table-cell>
          <table:table-cell office:value-type="float" office:value="78.68" calcext:value-type="float">
            <text:p>78,68</text:p>
          </table:table-cell>
          <table:table-cell office:value-type="float" office:value="840.74" calcext:value-type="float">
            <text:p>840,74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7666" calcext:value-type="float">
            <text:p>347666</text:p>
          </table:table-cell>
          <table:table-cell office:value-type="float" office:value="34.12" calcext:value-type="float">
            <text:p>34,12</text:p>
          </table:table-cell>
          <table:table-cell office:value-type="string" calcext:value-type="string">
            <text:p>1.css</text:p>
          </table:table-cell>
          <table:table-cell table:formula="of:=([$Settings.$D$4]*([.F23]/100)/[$Settings.$B$4]+[$Settings.$D$4]/[.B23]+[$Settings.$D$4]*([.F23]/100)/[.C23])*1000+[$Settings.$C$4]" office:value-type="float" office:value="364.315543175288" calcext:value-type="float">
            <text:p>364,32</text:p>
          </table:table-cell>
        </table:table-row>
        <table:table-row table:style-name="ro1" table:visibility="collapse">
          <table:table-cell office:value-type="string" calcext:value-type="string">
            <text:p>brotli 1.2.0 -9</text:p>
          </table:table-cell>
          <table:table-cell office:value-type="float" office:value="33.36" calcext:value-type="float">
            <text:p>33,36</text:p>
          </table:table-cell>
          <table:table-cell office:value-type="float" office:value="842.3" calcext:value-type="float">
            <text:p>842,3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6864" calcext:value-type="float">
            <text:p>346864</text:p>
          </table:table-cell>
          <table:table-cell office:value-type="float" office:value="34.04" calcext:value-type="float">
            <text:p>34,04</text:p>
          </table:table-cell>
          <table:table-cell office:value-type="string" calcext:value-type="string">
            <text:p>1.css</text:p>
          </table:table-cell>
          <table:table-cell table:formula="of:=([$Settings.$D$4]*([.F24]/100)/[$Settings.$B$4]+[$Settings.$D$4]/[.B24]+[$Settings.$D$4]*([.F24]/100)/[.C24])*1000+[$Settings.$C$4]" office:value-type="float" office:value="380.780150729233" calcext:value-type="float">
            <text:p>380,78</text:p>
          </table:table-cell>
        </table:table-row>
        <table:table-row table:style-name="ro1" table:visibility="collapse">
          <table:table-cell office:value-type="string" calcext:value-type="string">
            <text:p>brotli 1.2.0 -10</text:p>
          </table:table-cell>
          <table:table-cell office:value-type="float" office:value="2.75" calcext:value-type="float">
            <text:p>2,75</text:p>
          </table:table-cell>
          <table:table-cell office:value-type="float" office:value="458.94" calcext:value-type="float">
            <text:p>458,94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37914" calcext:value-type="float">
            <text:p>337914</text:p>
          </table:table-cell>
          <table:table-cell office:value-type="float" office:value="33.16" calcext:value-type="float">
            <text:p>33,16</text:p>
          </table:table-cell>
          <table:table-cell office:value-type="string" calcext:value-type="string">
            <text:p>1.css</text:p>
          </table:table-cell>
          <table:table-cell table:formula="of:=([$Settings.$D$4]*([.F25]/100)/[$Settings.$B$4]+[$Settings.$D$4]/[.B25]+[$Settings.$D$4]*([.F25]/100)/[.C25])*1000+[$Settings.$C$4]" office:value-type="float" office:value="705.958898172469" calcext:value-type="float">
            <text:p>705,96</text:p>
          </table:table-cell>
        </table:table-row>
        <table:table-row table:style-name="ro1" table:visibility="collapse">
          <table:table-cell office:value-type="string" calcext:value-type="string">
            <text:p>brotli 1.2.0 -11</text:p>
          </table:table-cell>
          <table:table-cell office:value-type="float" office:value="1.08" calcext:value-type="float">
            <text:p>1,08</text:p>
          </table:table-cell>
          <table:table-cell office:value-type="float" office:value="466" calcext:value-type="float">
            <text:p>466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36505" calcext:value-type="float">
            <text:p>336505</text:p>
          </table:table-cell>
          <table:table-cell office:value-type="float" office:value="33.02" calcext:value-type="float">
            <text:p>33,02</text:p>
          </table:table-cell>
          <table:table-cell office:value-type="string" calcext:value-type="string">
            <text:p>1.css</text:p>
          </table:table-cell>
          <table:table-cell table:formula="of:=([$Settings.$D$4]*([.F26]/100)/[$Settings.$B$4]+[$Settings.$D$4]/[.B26]+[$Settings.$D$4]*([.F26]/100)/[.C26])*1000+[$Settings.$C$4]" office:value-type="float" office:value="1266.83450961691" calcext:value-type="float">
            <text:p>1266,83</text:p>
          </table:table-cell>
        </table:table-row>
        <table:table-row table:style-name="ro1">
          <table:table-cell office:value-type="string" calcext:value-type="string">
            <text:p>zstd 1.5.7 -1</text:p>
          </table:table-cell>
          <table:table-cell office:value-type="float" office:value="832.85" calcext:value-type="float">
            <text:p>832,85</text:p>
          </table:table-cell>
          <table:table-cell office:value-type="float" office:value="1777.62" calcext:value-type="float">
            <text:p>1777,62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90447" calcext:value-type="float">
            <text:p>390447</text:p>
          </table:table-cell>
          <table:table-cell office:value-type="float" office:value="38.31" calcext:value-type="float">
            <text:p>38,31</text:p>
          </table:table-cell>
          <table:table-cell office:value-type="string" calcext:value-type="string">
            <text:p>1.css</text:p>
          </table:table-cell>
          <table:table-cell table:formula="of:=([$Settings.$D$4]*([.F27]/100)/[$Settings.$B$4]+[$Settings.$D$4]/[.B27]+[$Settings.$D$4]*([.F27]/100)/[.C27])*1000+[$Settings.$C$4]" office:value-type="float" office:value="394.516209280682" calcext:value-type="float">
            <text:p>394,52</text:p>
          </table:table-cell>
        </table:table-row>
        <table:table-row table:style-name="ro1">
          <table:table-cell office:value-type="string" calcext:value-type="string">
            <text:p>zstd 1.5.7 -2</text:p>
          </table:table-cell>
          <table:table-cell office:value-type="float" office:value="739.07" calcext:value-type="float">
            <text:p>739,07</text:p>
          </table:table-cell>
          <table:table-cell office:value-type="float" office:value="1686.06" calcext:value-type="float">
            <text:p>1686,06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81749" calcext:value-type="float">
            <text:p>381749</text:p>
          </table:table-cell>
          <table:table-cell office:value-type="float" office:value="37.46" calcext:value-type="float">
            <text:p>37,46</text:p>
          </table:table-cell>
          <table:table-cell office:value-type="string" calcext:value-type="string">
            <text:p>1.css</text:p>
          </table:table-cell>
          <table:table-cell table:formula="of:=([$Settings.$D$4]*([.F28]/100)/[$Settings.$B$4]+[$Settings.$D$4]/[.B28]+[$Settings.$D$4]*([.F28]/100)/[.C28])*1000+[$Settings.$C$4]" office:value-type="float" office:value="386.17522658268" calcext:value-type="float">
            <text:p>386,18</text:p>
          </table:table-cell>
        </table:table-row>
        <table:table-row table:style-name="ro1">
          <table:table-cell office:value-type="string" calcext:value-type="string">
            <text:p>zstd 1.5.7 -3</text:p>
          </table:table-cell>
          <table:table-cell office:value-type="float" office:value="632.15" calcext:value-type="float">
            <text:p>632,15</text:p>
          </table:table-cell>
          <table:table-cell office:value-type="float" office:value="1702.85" calcext:value-type="float">
            <text:p>1702,85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69870" calcext:value-type="float">
            <text:p>369870</text:p>
          </table:table-cell>
          <table:table-cell office:value-type="float" office:value="36.29" calcext:value-type="float">
            <text:p>36,29</text:p>
          </table:table-cell>
          <table:table-cell office:value-type="string" calcext:value-type="string">
            <text:p>1.css</text:p>
          </table:table-cell>
          <table:table-cell table:formula="of:=([$Settings.$D$4]*([.F29]/100)/[$Settings.$B$4]+[$Settings.$D$4]/[.B29]+[$Settings.$D$4]*([.F29]/100)/[.C29])*1000+[$Settings.$C$4]" office:value-type="float" office:value="374.695016339383" calcext:value-type="float">
            <text:p>374,70</text:p>
          </table:table-cell>
        </table:table-row>
        <table:table-row table:style-name="ro1">
          <table:table-cell office:value-type="string" calcext:value-type="string">
            <text:p>zstd 1.5.7 -4</text:p>
          </table:table-cell>
          <table:table-cell office:value-type="float" office:value="610.81" calcext:value-type="float">
            <text:p>610,81</text:p>
          </table:table-cell>
          <table:table-cell office:value-type="float" office:value="1679.72" calcext:value-type="float">
            <text:p>1679,72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69767" calcext:value-type="float">
            <text:p>369767</text:p>
          </table:table-cell>
          <table:table-cell office:value-type="float" office:value="36.28" calcext:value-type="float">
            <text:p>36,28</text:p>
          </table:table-cell>
          <table:table-cell office:value-type="string" calcext:value-type="string">
            <text:p>1.css</text:p>
          </table:table-cell>
          <table:table-cell table:formula="of:=([$Settings.$D$4]*([.F30]/100)/[$Settings.$B$4]+[$Settings.$D$4]/[.B30]+[$Settings.$D$4]*([.F30]/100)/[.C30])*1000+[$Settings.$C$4]" office:value-type="float" office:value="374.653158693843" calcext:value-type="float">
            <text:p>374,65</text:p>
          </table:table-cell>
        </table:table-row>
        <table:table-row table:style-name="ro1">
          <table:table-cell office:value-type="string" calcext:value-type="string">
            <text:p>zstd 1.5.7 -5</text:p>
          </table:table-cell>
          <table:table-cell office:value-type="float" office:value="292.53" calcext:value-type="float">
            <text:p>292,53</text:p>
          </table:table-cell>
          <table:table-cell office:value-type="float" office:value="1819.12" calcext:value-type="float">
            <text:p>1819,12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58042" calcext:value-type="float">
            <text:p>358042</text:p>
          </table:table-cell>
          <table:table-cell office:value-type="float" office:value="35.13" calcext:value-type="float">
            <text:p>35,13</text:p>
          </table:table-cell>
          <table:table-cell office:value-type="string" calcext:value-type="string">
            <text:p>1.css</text:p>
          </table:table-cell>
          <table:table-cell table:formula="of:=([$Settings.$D$4]*([.F31]/100)/[$Settings.$B$4]+[$Settings.$D$4]/[.B31]+[$Settings.$D$4]*([.F31]/100)/[.C31])*1000+[$Settings.$C$4]" office:value-type="float" office:value="364.911568160737" calcext:value-type="float">
            <text:p>364,91</text:p>
          </table:table-cell>
        </table:table-row>
        <table:table-row table:style-name="ro1">
          <table:table-cell office:value-type="string" calcext:value-type="string">
            <text:p>zstd 1.5.7 -6</text:p>
          </table:table-cell>
          <table:table-cell office:value-type="float" office:value="226.18" calcext:value-type="float">
            <text:p>226,18</text:p>
          </table:table-cell>
          <table:table-cell office:value-type="float" office:value="1877.61" calcext:value-type="float">
            <text:p>1877,61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53880" calcext:value-type="float">
            <text:p>353880</text:p>
          </table:table-cell>
          <table:table-cell office:value-type="float" office:value="34.73" calcext:value-type="float">
            <text:p>34,73</text:p>
          </table:table-cell>
          <table:table-cell office:value-type="string" calcext:value-type="string">
            <text:p>1.css</text:p>
          </table:table-cell>
          <table:table-cell table:formula="of:=([$Settings.$D$4]*([.F32]/100)/[$Settings.$B$4]+[$Settings.$D$4]/[.B32]+[$Settings.$D$4]*([.F32]/100)/[.C32])*1000+[$Settings.$C$4]" office:value-type="float" office:value="361.906226595161" calcext:value-type="float">
            <text:p>361,91</text:p>
          </table:table-cell>
        </table:table-row>
        <table:table-row table:style-name="ro1">
          <table:table-cell office:value-type="string" calcext:value-type="string">
            <text:p>zstd 1.5.7 -7</text:p>
          </table:table-cell>
          <table:table-cell office:value-type="float" office:value="204.83" calcext:value-type="float">
            <text:p>204,83</text:p>
          </table:table-cell>
          <table:table-cell office:value-type="float" office:value="1923.58" calcext:value-type="float">
            <text:p>1923,58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51843" calcext:value-type="float">
            <text:p>351843</text:p>
          </table:table-cell>
          <table:table-cell office:value-type="float" office:value="34.53" calcext:value-type="float">
            <text:p>34,53</text:p>
          </table:table-cell>
          <table:table-cell office:value-type="string" calcext:value-type="string">
            <text:p>1.css</text:p>
          </table:table-cell>
          <table:table-cell table:formula="of:=([$Settings.$D$4]*([.F33]/100)/[$Settings.$B$4]+[$Settings.$D$4]/[.B33]+[$Settings.$D$4]*([.F33]/100)/[.C33])*1000+[$Settings.$C$4]" office:value-type="float" office:value="360.361606389456" calcext:value-type="float">
            <text:p>360,36</text:p>
          </table:table-cell>
        </table:table-row>
        <table:table-row table:style-name="ro1">
          <table:table-cell office:value-type="string" calcext:value-type="string">
            <text:p>zstd 1.5.7 -8</text:p>
          </table:table-cell>
          <table:table-cell office:value-type="float" office:value="166.53" calcext:value-type="float">
            <text:p>166,53</text:p>
          </table:table-cell>
          <table:table-cell office:value-type="float" office:value="1945.69" calcext:value-type="float">
            <text:p>1945,69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50831" calcext:value-type="float">
            <text:p>350831</text:p>
          </table:table-cell>
          <table:table-cell office:value-type="float" office:value="34.43" calcext:value-type="float">
            <text:p>34,43</text:p>
          </table:table-cell>
          <table:table-cell office:value-type="string" calcext:value-type="string">
            <text:p>1.css</text:p>
          </table:table-cell>
          <table:table-cell table:formula="of:=([$Settings.$D$4]*([.F34]/100)/[$Settings.$B$4]+[$Settings.$D$4]/[.B34]+[$Settings.$D$4]*([.F34]/100)/[.C34])*1000+[$Settings.$C$4]" office:value-type="float" office:value="360.481879256682" calcext:value-type="float">
            <text:p>360,48</text:p>
          </table:table-cell>
        </table:table-row>
        <table:table-row table:style-name="ro1">
          <table:table-cell office:value-type="string" calcext:value-type="string">
            <text:p>zstd 1.5.7 -9</text:p>
          </table:table-cell>
          <table:table-cell office:value-type="float" office:value="161.21" calcext:value-type="float">
            <text:p>161,21</text:p>
          </table:table-cell>
          <table:table-cell office:value-type="float" office:value="1946.21" calcext:value-type="float">
            <text:p>1946,21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50801" calcext:value-type="float">
            <text:p>350801</text:p>
          </table:table-cell>
          <table:table-cell office:value-type="float" office:value="34.42" calcext:value-type="float">
            <text:p>34,42</text:p>
          </table:table-cell>
          <table:table-cell office:value-type="string" calcext:value-type="string">
            <text:p>1.css</text:p>
          </table:table-cell>
          <table:table-cell table:formula="of:=([$Settings.$D$4]*([.F35]/100)/[$Settings.$B$4]+[$Settings.$D$4]/[.B35]+[$Settings.$D$4]*([.F35]/100)/[.C35])*1000+[$Settings.$C$4]" office:value-type="float" office:value="360.579945695494" calcext:value-type="float">
            <text:p>360,58</text:p>
          </table:table-cell>
        </table:table-row>
        <table:table-row table:style-name="ro1">
          <table:table-cell office:value-type="string" calcext:value-type="string">
            <text:p>zstd 1.5.7 -10</text:p>
          </table:table-cell>
          <table:table-cell office:value-type="float" office:value="136.01" calcext:value-type="float">
            <text:p>136,01</text:p>
          </table:table-cell>
          <table:table-cell office:value-type="float" office:value="1980.51" calcext:value-type="float">
            <text:p>1980,51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9475" calcext:value-type="float">
            <text:p>349475</text:p>
          </table:table-cell>
          <table:table-cell office:value-type="float" office:value="34.29" calcext:value-type="float">
            <text:p>34,29</text:p>
          </table:table-cell>
          <table:table-cell office:value-type="string" calcext:value-type="string">
            <text:p>1.css</text:p>
          </table:table-cell>
          <table:table-cell table:formula="of:=([$Settings.$D$4]*([.F36]/100)/[$Settings.$B$4]+[$Settings.$D$4]/[.B36]+[$Settings.$D$4]*([.F36]/100)/[.C36])*1000+[$Settings.$C$4]" office:value-type="float" office:value="360.425537781013" calcext:value-type="float">
            <text:p>360,43</text:p>
          </table:table-cell>
        </table:table-row>
        <table:table-row table:style-name="ro1">
          <table:table-cell office:value-type="string" calcext:value-type="string">
            <text:p>zstd 1.5.7 -11</text:p>
          </table:table-cell>
          <table:table-cell office:value-type="float" office:value="96.99" calcext:value-type="float">
            <text:p>96,99</text:p>
          </table:table-cell>
          <table:table-cell office:value-type="float" office:value="1968.38" calcext:value-type="float">
            <text:p>1968,38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8447" calcext:value-type="float">
            <text:p>348447</text:p>
          </table:table-cell>
          <table:table-cell office:value-type="float" office:value="34.19" calcext:value-type="float">
            <text:p>34,19</text:p>
          </table:table-cell>
          <table:table-cell office:value-type="string" calcext:value-type="string">
            <text:p>1.css</text:p>
          </table:table-cell>
          <table:table-cell table:formula="of:=([$Settings.$D$4]*([.F37]/100)/[$Settings.$B$4]+[$Settings.$D$4]/[.B37]+[$Settings.$D$4]*([.F37]/100)/[.C37])*1000+[$Settings.$C$4]" office:value-type="float" office:value="362.384037408205" calcext:value-type="float">
            <text:p>362,38</text:p>
          </table:table-cell>
        </table:table-row>
        <table:table-row table:style-name="ro1">
          <table:table-cell office:value-type="string" calcext:value-type="string">
            <text:p>zstd 1.5.7 -12</text:p>
          </table:table-cell>
          <table:table-cell office:value-type="float" office:value="99.46" calcext:value-type="float">
            <text:p>99,46</text:p>
          </table:table-cell>
          <table:table-cell office:value-type="float" office:value="1966.44" calcext:value-type="float">
            <text:p>1966,44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8447" calcext:value-type="float">
            <text:p>348447</text:p>
          </table:table-cell>
          <table:table-cell office:value-type="float" office:value="34.19" calcext:value-type="float">
            <text:p>34,19</text:p>
          </table:table-cell>
          <table:table-cell office:value-type="string" calcext:value-type="string">
            <text:p>1.css</text:p>
          </table:table-cell>
          <table:table-cell table:formula="of:=([$Settings.$D$4]*([.F38]/100)/[$Settings.$B$4]+[$Settings.$D$4]/[.B38]+[$Settings.$D$4]*([.F38]/100)/[.C38])*1000+[$Settings.$C$4]" office:value-type="float" office:value="362.128160679782" calcext:value-type="float">
            <text:p>362,13</text:p>
          </table:table-cell>
        </table:table-row>
        <table:table-row table:style-name="ro1" table:visibility="collapse">
          <table:table-cell office:value-type="string" calcext:value-type="string">
            <text:p>zstd 1.5.7 -13</text:p>
          </table:table-cell>
          <table:table-cell office:value-type="float" office:value="48.36" calcext:value-type="float">
            <text:p>48,36</text:p>
          </table:table-cell>
          <table:table-cell office:value-type="float" office:value="1963.91" calcext:value-type="float">
            <text:p>1963,91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7687" calcext:value-type="float">
            <text:p>347687</text:p>
          </table:table-cell>
          <table:table-cell office:value-type="float" office:value="34.12" calcext:value-type="float">
            <text:p>34,12</text:p>
          </table:table-cell>
          <table:table-cell office:value-type="string" calcext:value-type="string">
            <text:p>1.css</text:p>
          </table:table-cell>
          <table:table-cell table:formula="of:=([$Settings.$D$4]*([.F39]/100)/[$Settings.$B$4]+[$Settings.$D$4]/[.B39]+[$Settings.$D$4]*([.F39]/100)/[.C39])*1000+[$Settings.$C$4]" office:value-type="float" office:value="372.051981533657" calcext:value-type="float">
            <text:p>372,05</text:p>
          </table:table-cell>
        </table:table-row>
        <table:table-row table:style-name="ro1" table:visibility="collapse">
          <table:table-cell office:value-type="string" calcext:value-type="string">
            <text:p>zstd 1.5.7 -14</text:p>
          </table:table-cell>
          <table:table-cell office:value-type="float" office:value="40.79" calcext:value-type="float">
            <text:p>40,79</text:p>
          </table:table-cell>
          <table:table-cell office:value-type="float" office:value="1975.87" calcext:value-type="float">
            <text:p>1975,87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6769" calcext:value-type="float">
            <text:p>346769</text:p>
          </table:table-cell>
          <table:table-cell office:value-type="float" office:value="34.03" calcext:value-type="float">
            <text:p>34,03</text:p>
          </table:table-cell>
          <table:table-cell office:value-type="string" calcext:value-type="string">
            <text:p>1.css</text:p>
          </table:table-cell>
          <table:table-cell table:formula="of:=([$Settings.$D$4]*([.F40]/100)/[$Settings.$B$4]+[$Settings.$D$4]/[.B40]+[$Settings.$D$4]*([.F40]/100)/[.C40])*1000+[$Settings.$C$4]" office:value-type="float" office:value="374.988040629166" calcext:value-type="float">
            <text:p>374,99</text:p>
          </table:table-cell>
        </table:table-row>
        <table:table-row table:style-name="ro1" table:visibility="collapse">
          <table:table-cell office:value-type="string" calcext:value-type="string">
            <text:p>zstd 1.5.7 -15</text:p>
          </table:table-cell>
          <table:table-cell office:value-type="float" office:value="36.51" calcext:value-type="float">
            <text:p>36,51</text:p>
          </table:table-cell>
          <table:table-cell office:value-type="float" office:value="1978.59" calcext:value-type="float">
            <text:p>1978,59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6509" calcext:value-type="float">
            <text:p>3465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css</text:p>
          </table:table-cell>
          <table:table-cell table:formula="of:=([$Settings.$D$4]*([.F41]/100)/[$Settings.$B$4]+[$Settings.$D$4]/[.B41]+[$Settings.$D$4]*([.F41]/100)/[.C41])*1000+[$Settings.$C$4]" office:value-type="float" office:value="377.56159577347" calcext:value-type="float">
            <text:p>377,56</text:p>
          </table:table-cell>
        </table:table-row>
        <table:table-row table:style-name="ro1" table:visibility="collapse">
          <table:table-cell office:value-type="string" calcext:value-type="string">
            <text:p>zstd 1.5.7 -16</text:p>
          </table:table-cell>
          <table:table-cell office:value-type="float" office:value="17.74" calcext:value-type="float">
            <text:p>17,74</text:p>
          </table:table-cell>
          <table:table-cell office:value-type="float" office:value="1986.73" calcext:value-type="float">
            <text:p>1986,73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2808" calcext:value-type="float">
            <text:p>342808</text:p>
          </table:table-cell>
          <table:table-cell office:value-type="float" office:value="33.64" calcext:value-type="float">
            <text:p>33,64</text:p>
          </table:table-cell>
          <table:table-cell office:value-type="string" calcext:value-type="string">
            <text:p>1.css</text:p>
          </table:table-cell>
          <table:table-cell table:formula="of:=([$Settings.$D$4]*([.F42]/100)/[$Settings.$B$4]+[$Settings.$D$4]/[.B42]+[$Settings.$D$4]*([.F42]/100)/[.C42])*1000+[$Settings.$C$4]" office:value-type="float" office:value="402.939109255979" calcext:value-type="float">
            <text:p>402,94</text:p>
          </table:table-cell>
        </table:table-row>
        <table:table-row table:style-name="ro1" table:visibility="collapse">
          <table:table-cell office:value-type="string" calcext:value-type="string">
            <text:p>zstd 1.5.7 -17</text:p>
          </table:table-cell>
          <table:table-cell office:value-type="float" office:value="15.93" calcext:value-type="float">
            <text:p>15,93</text:p>
          </table:table-cell>
          <table:table-cell office:value-type="float" office:value="1962.93" calcext:value-type="float">
            <text:p>1962,93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2396" calcext:value-type="float">
            <text:p>342396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1.css</text:p>
          </table:table-cell>
          <table:table-cell table:formula="of:=([$Settings.$D$4]*([.F43]/100)/[$Settings.$B$4]+[$Settings.$D$4]/[.B43]+[$Settings.$D$4]*([.F43]/100)/[.C43])*1000+[$Settings.$C$4]" office:value-type="float" office:value="408.945811731556" calcext:value-type="float">
            <text:p>408,95</text:p>
          </table:table-cell>
        </table:table-row>
        <table:table-row table:style-name="ro1" table:visibility="collapse">
          <table:table-cell office:value-type="string" calcext:value-type="string">
            <text:p>zstd 1.5.7 -18</text:p>
          </table:table-cell>
          <table:table-cell office:value-type="float" office:value="9.35" calcext:value-type="float">
            <text:p>9,35</text:p>
          </table:table-cell>
          <table:table-cell office:value-type="float" office:value="1890.08" calcext:value-type="float">
            <text:p>1890,08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2211" calcext:value-type="float">
            <text:p>342211</text:p>
          </table:table-cell>
          <table:table-cell office:value-type="float" office:value="33.58" calcext:value-type="float">
            <text:p>33,58</text:p>
          </table:table-cell>
          <table:table-cell office:value-type="string" calcext:value-type="string">
            <text:p>1.css</text:p>
          </table:table-cell>
          <table:table-cell table:formula="of:=([$Settings.$D$4]*([.F44]/100)/[$Settings.$B$4]+[$Settings.$D$4]/[.B44]+[$Settings.$D$4]*([.F44]/100)/[.C44])*1000+[$Settings.$C$4]" office:value-type="float" office:value="452.929536095238" calcext:value-type="float">
            <text:p>452,93</text:p>
          </table:table-cell>
        </table:table-row>
        <table:table-row table:style-name="ro1" table:visibility="collapse">
          <table:table-cell office:value-type="string" calcext:value-type="string">
            <text:p>zstd 1.5.7 -19</text:p>
          </table:table-cell>
          <table:table-cell office:value-type="float" office:value="6.57" calcext:value-type="float">
            <text:p>6,57</text:p>
          </table:table-cell>
          <table:table-cell office:value-type="float" office:value="1900.55" calcext:value-type="float">
            <text:p>1900,55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0982" calcext:value-type="float">
            <text:p>340982</text:p>
          </table:table-cell>
          <table:table-cell office:value-type="float" office:value="33.46" calcext:value-type="float">
            <text:p>33,46</text:p>
          </table:table-cell>
          <table:table-cell office:value-type="string" calcext:value-type="string">
            <text:p>1.css</text:p>
          </table:table-cell>
          <table:table-cell table:formula="of:=([$Settings.$D$4]*([.F45]/100)/[$Settings.$B$4]+[$Settings.$D$4]/[.B45]+[$Settings.$D$4]*([.F45]/100)/[.C45])*1000+[$Settings.$C$4]" office:value-type="float" office:value="496.983055822141" calcext:value-type="float">
            <text:p>496,98</text:p>
          </table:table-cell>
        </table:table-row>
        <table:table-row table:style-name="ro1" table:visibility="collapse">
          <table:table-cell office:value-type="string" calcext:value-type="string">
            <text:p>zstd 1.5.7 -20</text:p>
          </table:table-cell>
          <table:table-cell office:value-type="float" office:value="6.61" calcext:value-type="float">
            <text:p>6,61</text:p>
          </table:table-cell>
          <table:table-cell office:value-type="float" office:value="1899.66" calcext:value-type="float">
            <text:p>1899,66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0982" calcext:value-type="float">
            <text:p>340982</text:p>
          </table:table-cell>
          <table:table-cell office:value-type="float" office:value="33.46" calcext:value-type="float">
            <text:p>33,46</text:p>
          </table:table-cell>
          <table:table-cell office:value-type="string" calcext:value-type="string">
            <text:p>1.css</text:p>
          </table:table-cell>
          <table:table-cell table:formula="of:=([$Settings.$D$4]*([.F46]/100)/[$Settings.$B$4]+[$Settings.$D$4]/[.B46]+[$Settings.$D$4]*([.F46]/100)/[.C46])*1000+[$Settings.$C$4]" office:value-type="float" office:value="496.062067190844" calcext:value-type="float">
            <text:p>496,06</text:p>
          </table:table-cell>
        </table:table-row>
        <table:table-row table:style-name="ro1" table:visibility="collapse">
          <table:table-cell office:value-type="string" calcext:value-type="string">
            <text:p>zstd 1.5.7 -21</text:p>
          </table:table-cell>
          <table:table-cell office:value-type="float" office:value="6.17" calcext:value-type="float">
            <text:p>6,17</text:p>
          </table:table-cell>
          <table:table-cell office:value-type="float" office:value="1908.84" calcext:value-type="float">
            <text:p>1908,84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0929" calcext:value-type="float">
            <text:p>340929</text:p>
          </table:table-cell>
          <table:table-cell office:value-type="float" office:value="33.45" calcext:value-type="float">
            <text:p>33,45</text:p>
          </table:table-cell>
          <table:table-cell office:value-type="string" calcext:value-type="string">
            <text:p>1.css</text:p>
          </table:table-cell>
          <table:table-cell table:formula="of:=([$Settings.$D$4]*([.F47]/100)/[$Settings.$B$4]+[$Settings.$D$4]/[.B47]+[$Settings.$D$4]*([.F47]/100)/[.C47])*1000+[$Settings.$C$4]" office:value-type="float" office:value="506.74979161188" calcext:value-type="float">
            <text:p>506,75</text:p>
          </table:table-cell>
        </table:table-row>
        <table:table-row table:style-name="ro1" table:visibility="collapse">
          <table:table-cell office:value-type="string" calcext:value-type="string">
            <text:p>zstd 1.5.7 -22</text:p>
          </table:table-cell>
          <table:table-cell office:value-type="float" office:value="5.22" calcext:value-type="float">
            <text:p>5,22</text:p>
          </table:table-cell>
          <table:table-cell office:value-type="float" office:value="1904.06" calcext:value-type="float">
            <text:p>1904,06</text:p>
          </table:table-cell>
          <table:table-cell office:value-type="float" office:value="1019080" calcext:value-type="float">
            <text:p>1019080</text:p>
          </table:table-cell>
          <table:table-cell office:value-type="float" office:value="340928" calcext:value-type="float">
            <text:p>340928</text:p>
          </table:table-cell>
          <table:table-cell office:value-type="float" office:value="33.45" calcext:value-type="float">
            <text:p>33,45</text:p>
          </table:table-cell>
          <table:table-cell office:value-type="string" calcext:value-type="string">
            <text:p>1.css</text:p>
          </table:table-cell>
          <table:table-cell table:formula="of:=([$Settings.$D$4]*([.F48]/100)/[$Settings.$B$4]+[$Settings.$D$4]/[.B48]+[$Settings.$D$4]*([.F48]/100)/[.C48])*1000+[$Settings.$C$4]" office:value-type="float" office:value="536.246558463116" calcext:value-type="float">
            <text:p>536,25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>
            <draw:frame draw:z-index="0" draw:style-name="gr1" draw:text-style-name="P1" svg:width="25.659cm" svg:height="16.983cm" svg:x="0cm" svg:y="0.052cm">
              <draw:object draw:notify-on-update-of-ranges="CSS.A5:CSS.A5 CSS.A6:CSS.A48 CSS.H5:CSS.H5 CSS.H6:CSS.H4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Default"/>
        </table:table-row>
      </table:table>
      <table:table table:name="JS" table:style-name="ta1"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visibility="collapse" table:default-cell-style-name="Default"/>
        <table:table-column table:style-name="co19" table:default-cell-style-name="ce5"/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<text:s/>./lzbench -o4 -ezlib/brotli/zstd 1.js</text:p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style-name="ce2" office:value-type="string" calcext:value-type="string">
            <text:p>Compressor name/level</text:p>
          </table:table-cell>
          <table:table-cell table:style-name="ce2" office:value-type="string" calcext:value-type="string">
            <text:p>Compression speed (MB/s)</text:p>
          </table:table-cell>
          <table:table-cell table:style-name="ce2" office:value-type="string" calcext:value-type="string">
            <text:p>Decompression speed (MB/s)</text:p>
          </table:table-cell>
          <table:table-cell table:style-name="ce2" office:value-type="string" calcext:value-type="string">
            <text:p>Original size (B)</text:p>
          </table:table-cell>
          <table:table-cell table:style-name="ce2" office:value-type="string" calcext:value-type="string">
            <text:p>Compressed size (B)</text:p>
          </table:table-cell>
          <table:table-cell table:style-name="ce2" office:value-type="string" calcext:value-type="string">
            <text:p>Ratio (%)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Total time (ms)</text:p>
          </table:table-cell>
        </table:table-row>
        <table:table-row table:style-name="ro1">
          <table:table-cell office:value-type="string" calcext:value-type="string">
            <text:p>zlib 1.3.1 -1</text:p>
          </table:table-cell>
          <table:table-cell office:value-type="float" office:value="150.26" calcext:value-type="float">
            <text:p>150,26</text:p>
          </table:table-cell>
          <table:table-cell office:value-type="float" office:value="473.88" calcext:value-type="float">
            <text:p>473,88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578475" calcext:value-type="float">
            <text:p>578475</text:p>
          </table:table-cell>
          <table:table-cell office:value-type="float" office:value="32.04" calcext:value-type="float">
            <text:p>32,04</text:p>
          </table:table-cell>
          <table:table-cell office:value-type="string" calcext:value-type="string">
            <text:p>1.js</text:p>
          </table:table-cell>
          <table:table-cell table:formula="of:=([$Settings.$D$4]*([.F6]/100)/[$Settings.$B$4]+[$Settings.$D$4]/[.B6]+[$Settings.$D$4]*([.F6]/100)/[.C6])*1000+[$Settings.$C$4]" office:value-type="float" office:value="337.731251642928" calcext:value-type="float">
            <text:p>337,73</text:p>
          </table:table-cell>
        </table:table-row>
        <table:table-row table:style-name="ro1">
          <table:table-cell office:value-type="string" calcext:value-type="string">
            <text:p>zlib 1.3.1 -2</text:p>
          </table:table-cell>
          <table:table-cell office:value-type="float" office:value="137.13" calcext:value-type="float">
            <text:p>137,13</text:p>
          </table:table-cell>
          <table:table-cell office:value-type="float" office:value="487.89" calcext:value-type="float">
            <text:p>487,89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559176" calcext:value-type="float">
            <text:p>559176</text:p>
          </table:table-cell>
          <table:table-cell office:value-type="float" office:value="30.97" calcext:value-type="float">
            <text:p>30,97</text:p>
          </table:table-cell>
          <table:table-cell office:value-type="string" calcext:value-type="string">
            <text:p>1.js</text:p>
          </table:table-cell>
          <table:table-cell table:formula="of:=([$Settings.$D$4]*([.F7]/100)/[$Settings.$B$4]+[$Settings.$D$4]/[.B7]+[$Settings.$D$4]*([.F7]/100)/[.C7])*1000+[$Settings.$C$4]" office:value-type="float" office:value="327.627124556406" calcext:value-type="float">
            <text:p>327,63</text:p>
          </table:table-cell>
        </table:table-row>
        <table:table-row table:style-name="ro1">
          <table:table-cell office:value-type="string" calcext:value-type="string">
            <text:p>zlib 1.3.1 -3</text:p>
          </table:table-cell>
          <table:table-cell office:value-type="float" office:value="114.69" calcext:value-type="float">
            <text:p>114,69</text:p>
          </table:table-cell>
          <table:table-cell office:value-type="float" office:value="497.85" calcext:value-type="float">
            <text:p>497,85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545749" calcext:value-type="float">
            <text:p>545749</text:p>
          </table:table-cell>
          <table:table-cell office:value-type="float" office:value="30.22" calcext:value-type="float">
            <text:p>30,22</text:p>
          </table:table-cell>
          <table:table-cell office:value-type="string" calcext:value-type="string">
            <text:p>1.js</text:p>
          </table:table-cell>
          <table:table-cell table:formula="of:=([$Settings.$D$4]*([.F8]/100)/[$Settings.$B$4]+[$Settings.$D$4]/[.B8]+[$Settings.$D$4]*([.F8]/100)/[.C8])*1000+[$Settings.$C$4]" office:value-type="float" office:value="321.526166129318" calcext:value-type="float">
            <text:p>321,53</text:p>
          </table:table-cell>
        </table:table-row>
        <table:table-row table:style-name="ro1">
          <table:table-cell office:value-type="string" calcext:value-type="string">
            <text:p>zlib 1.3.1 -4</text:p>
          </table:table-cell>
          <table:table-cell office:value-type="float" office:value="92.34" calcext:value-type="float">
            <text:p>92,34</text:p>
          </table:table-cell>
          <table:table-cell office:value-type="float" office:value="496.86" calcext:value-type="float">
            <text:p>496,86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514100" calcext:value-type="float">
            <text:p>514100</text:p>
          </table:table-cell>
          <table:table-cell office:value-type="float" office:value="28.47" calcext:value-type="float">
            <text:p>28,47</text:p>
          </table:table-cell>
          <table:table-cell office:value-type="string" calcext:value-type="string">
            <text:p>1.js</text:p>
          </table:table-cell>
          <table:table-cell table:formula="of:=([$Settings.$D$4]*([.F9]/100)/[$Settings.$B$4]+[$Settings.$D$4]/[.B9]+[$Settings.$D$4]*([.F9]/100)/[.C9])*1000+[$Settings.$C$4]" office:value-type="float" office:value="306.102541423427" calcext:value-type="float">
            <text:p>306,10</text:p>
          </table:table-cell>
        </table:table-row>
        <table:table-row table:style-name="ro1">
          <table:table-cell office:value-type="string" calcext:value-type="string">
            <text:p>zlib 1.3.1 -5</text:p>
          </table:table-cell>
          <table:table-cell office:value-type="float" office:value="68.32" calcext:value-type="float">
            <text:p>68,32</text:p>
          </table:table-cell>
          <table:table-cell office:value-type="float" office:value="500.11" calcext:value-type="float">
            <text:p>500,11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98387" calcext:value-type="float">
            <text:p>498387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1.js</text:p>
          </table:table-cell>
          <table:table-cell table:formula="of:=([$Settings.$D$4]*([.F10]/100)/[$Settings.$B$4]+[$Settings.$D$4]/[.B10]+[$Settings.$D$4]*([.F10]/100)/[.C10])*1000+[$Settings.$C$4]" office:value-type="float" office:value="301.188880928631" calcext:value-type="float">
            <text:p>301,19</text:p>
          </table:table-cell>
        </table:table-row>
        <table:table-row table:style-name="ro1">
          <table:table-cell office:value-type="string" calcext:value-type="string">
            <text:p>zlib 1.3.1 -6</text:p>
          </table:table-cell>
          <table:table-cell office:value-type="float" office:value="51.95" calcext:value-type="float">
            <text:p>51,95</text:p>
          </table:table-cell>
          <table:table-cell office:value-type="float" office:value="506.68" calcext:value-type="float">
            <text:p>506,68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93448" calcext:value-type="float">
            <text:p>493448</text:p>
          </table:table-cell>
          <table:table-cell office:value-type="float" office:value="27.33" calcext:value-type="float">
            <text:p>27,33</text:p>
          </table:table-cell>
          <table:table-cell office:value-type="string" calcext:value-type="string">
            <text:p>1.js</text:p>
          </table:table-cell>
          <table:table-cell table:formula="of:=([$Settings.$D$4]*([.F11]/100)/[$Settings.$B$4]+[$Settings.$D$4]/[.B11]+[$Settings.$D$4]*([.F11]/100)/[.C11])*1000+[$Settings.$C$4]" office:value-type="float" office:value="303.088671852235" calcext:value-type="float">
            <text:p>303,09</text:p>
          </table:table-cell>
        </table:table-row>
        <table:table-row table:style-name="ro1">
          <table:table-cell office:value-type="string" calcext:value-type="string">
            <text:p>zlib 1.3.1 -7</text:p>
          </table:table-cell>
          <table:table-cell office:value-type="float" office:value="45.74" calcext:value-type="float">
            <text:p>45,74</text:p>
          </table:table-cell>
          <table:table-cell office:value-type="float" office:value="506.58" calcext:value-type="float">
            <text:p>506,58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92473" calcext:value-type="float">
            <text:p>492473</text:p>
          </table:table-cell>
          <table:table-cell office:value-type="float" office:value="27.27" calcext:value-type="float">
            <text:p>27,27</text:p>
          </table:table-cell>
          <table:table-cell office:value-type="string" calcext:value-type="string">
            <text:p>1.js</text:p>
          </table:table-cell>
          <table:table-cell table:formula="of:=([$Settings.$D$4]*([.F12]/100)/[$Settings.$B$4]+[$Settings.$D$4]/[.B12]+[$Settings.$D$4]*([.F12]/100)/[.C12])*1000+[$Settings.$C$4]" office:value-type="float" office:value="305.101017994534" calcext:value-type="float">
            <text:p>305,10</text:p>
          </table:table-cell>
        </table:table-row>
        <table:table-row table:style-name="ro1" table:visibility="collapse">
          <table:table-cell office:value-type="string" calcext:value-type="string">
            <text:p>zlib 1.3.1 -8</text:p>
          </table:table-cell>
          <table:table-cell office:value-type="float" office:value="39.88" calcext:value-type="float">
            <text:p>39,88</text:p>
          </table:table-cell>
          <table:table-cell office:value-type="float" office:value="506.86" calcext:value-type="float">
            <text:p>506,86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91952" calcext:value-type="float">
            <text:p>491952</text:p>
          </table:table-cell>
          <table:table-cell office:value-type="float" office:value="27.24" calcext:value-type="float">
            <text:p>27,24</text:p>
          </table:table-cell>
          <table:table-cell office:value-type="string" calcext:value-type="string">
            <text:p>1.js</text:p>
          </table:table-cell>
          <table:table-cell table:formula="of:=([$Settings.$D$4]*([.F13]/100)/[$Settings.$B$4]+[$Settings.$D$4]/[.B13]+[$Settings.$D$4]*([.F13]/100)/[.C13])*1000+[$Settings.$C$4]" office:value-type="float" office:value="308.012652185337" calcext:value-type="float">
            <text:p>308,01</text:p>
          </table:table-cell>
        </table:table-row>
        <table:table-row table:style-name="ro1" table:visibility="collapse">
          <table:table-cell office:value-type="string" calcext:value-type="string">
            <text:p>zlib 1.3.1 -9</text:p>
          </table:table-cell>
          <table:table-cell office:value-type="float" office:value="40.39" calcext:value-type="float">
            <text:p>40,39</text:p>
          </table:table-cell>
          <table:table-cell office:value-type="float" office:value="507.88" calcext:value-type="float">
            <text:p>507,88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91934" calcext:value-type="float">
            <text:p>491934</text:p>
          </table:table-cell>
          <table:table-cell office:value-type="float" office:value="27.24" calcext:value-type="float">
            <text:p>27,24</text:p>
          </table:table-cell>
          <table:table-cell office:value-type="string" calcext:value-type="string">
            <text:p>1.js</text:p>
          </table:table-cell>
          <table:table-cell table:formula="of:=([$Settings.$D$4]*([.F14]/100)/[$Settings.$B$4]+[$Settings.$D$4]/[.B14]+[$Settings.$D$4]*([.F14]/100)/[.C14])*1000+[$Settings.$C$4]" office:value-type="float" office:value="307.694950783379" calcext:value-type="float">
            <text:p>307,69</text:p>
          </table:table-cell>
        </table:table-row>
        <table:table-row table:style-name="ro1">
          <table:table-cell office:value-type="string" calcext:value-type="string">
            <text:p>brotli 1.2.0 -0</text:p>
          </table:table-cell>
          <table:table-cell office:value-type="float" office:value="465.1" calcext:value-type="float">
            <text:p>465,1</text:p>
          </table:table-cell>
          <table:table-cell office:value-type="float" office:value="526.78" calcext:value-type="float">
            <text:p>526,78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587558" calcext:value-type="float">
            <text:p>587558</text:p>
          </table:table-cell>
          <table:table-cell office:value-type="float" office:value="32.54" calcext:value-type="float">
            <text:p>32,54</text:p>
          </table:table-cell>
          <table:table-cell office:value-type="string" calcext:value-type="string">
            <text:p>1.js</text:p>
          </table:table-cell>
          <table:table-cell table:formula="of:=([$Settings.$D$4]*([.F15]/100)/[$Settings.$B$4]+[$Settings.$D$4]/[.B15]+[$Settings.$D$4]*([.F15]/100)/[.C15])*1000+[$Settings.$C$4]" office:value-type="float" office:value="338.167790427849" calcext:value-type="float">
            <text:p>338,17</text:p>
          </table:table-cell>
        </table:table-row>
        <table:table-row table:style-name="ro1">
          <table:table-cell office:value-type="string" calcext:value-type="string">
            <text:p>brotli 1.2.0 -1</text:p>
          </table:table-cell>
          <table:table-cell office:value-type="float" office:value="320.69" calcext:value-type="float">
            <text:p>320,69</text:p>
          </table:table-cell>
          <table:table-cell office:value-type="float" office:value="555.07" calcext:value-type="float">
            <text:p>555,07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556674" calcext:value-type="float">
            <text:p>556674</text:p>
          </table:table-cell>
          <table:table-cell office:value-type="float" office:value="30.83" calcext:value-type="float">
            <text:p>30,83</text:p>
          </table:table-cell>
          <table:table-cell office:value-type="string" calcext:value-type="string">
            <text:p>1.js</text:p>
          </table:table-cell>
          <table:table-cell table:formula="of:=([$Settings.$D$4]*([.F16]/100)/[$Settings.$B$4]+[$Settings.$D$4]/[.B16]+[$Settings.$D$4]*([.F16]/100)/[.C16])*1000+[$Settings.$C$4]" office:value-type="float" office:value="321.973701658743" calcext:value-type="float">
            <text:p>321,97</text:p>
          </table:table-cell>
        </table:table-row>
        <table:table-row table:style-name="ro1">
          <table:table-cell office:value-type="string" calcext:value-type="string">
            <text:p>brotli 1.2.0 -2</text:p>
          </table:table-cell>
          <table:table-cell office:value-type="float" office:value="180.75" calcext:value-type="float">
            <text:p>180,75</text:p>
          </table:table-cell>
          <table:table-cell office:value-type="float" office:value="603.52" calcext:value-type="float">
            <text:p>603,52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504900" calcext:value-type="float">
            <text:p>504900</text:p>
          </table:table-cell>
          <table:table-cell office:value-type="float" office:value="27.96" calcext:value-type="float">
            <text:p>27,96</text:p>
          </table:table-cell>
          <table:table-cell office:value-type="string" calcext:value-type="string">
            <text:p>1.js</text:p>
          </table:table-cell>
          <table:table-cell table:formula="of:=([$Settings.$D$4]*([.F17]/100)/[$Settings.$B$4]+[$Settings.$D$4]/[.B17]+[$Settings.$D$4]*([.F17]/100)/[.C17])*1000+[$Settings.$C$4]" office:value-type="float" office:value="295.595785536288" calcext:value-type="float">
            <text:p>295,60</text:p>
          </table:table-cell>
        </table:table-row>
        <table:table-row table:style-name="ro1">
          <table:table-cell office:value-type="string" calcext:value-type="string">
            <text:p>brotli 1.2.0 -3</text:p>
          </table:table-cell>
          <table:table-cell office:value-type="float" office:value="153.1" calcext:value-type="float">
            <text:p>153,1</text:p>
          </table:table-cell>
          <table:table-cell office:value-type="float" office:value="621.39" calcext:value-type="float">
            <text:p>621,39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97288" calcext:value-type="float">
            <text:p>497288</text:p>
          </table:table-cell>
          <table:table-cell office:value-type="float" office:value="27.54" calcext:value-type="float">
            <text:p>27,54</text:p>
          </table:table-cell>
          <table:table-cell office:value-type="string" calcext:value-type="string">
            <text:p>1.js</text:p>
          </table:table-cell>
          <table:table-cell table:formula="of:=([$Settings.$D$4]*([.F18]/100)/[$Settings.$B$4]+[$Settings.$D$4]/[.B18]+[$Settings.$D$4]*([.F18]/100)/[.C18])*1000+[$Settings.$C$4]" office:value-type="float" office:value="292.374878564165" calcext:value-type="float">
            <text:p>292,37</text:p>
          </table:table-cell>
        </table:table-row>
        <table:table-row table:style-name="ro1">
          <table:table-cell office:value-type="string" calcext:value-type="string">
            <text:p>brotli 1.2.0 -4</text:p>
          </table:table-cell>
          <table:table-cell office:value-type="float" office:value="117.07" calcext:value-type="float">
            <text:p>117,07</text:p>
          </table:table-cell>
          <table:table-cell office:value-type="float" office:value="691.56" calcext:value-type="float">
            <text:p>691,56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82934" calcext:value-type="float">
            <text:p>482934</text:p>
          </table:table-cell>
          <table:table-cell office:value-type="float" office:value="26.74" calcext:value-type="float">
            <text:p>26,74</text:p>
          </table:table-cell>
          <table:table-cell office:value-type="string" calcext:value-type="string">
            <text:p>1.js</text:p>
          </table:table-cell>
          <table:table-cell table:formula="of:=([$Settings.$D$4]*([.F19]/100)/[$Settings.$B$4]+[$Settings.$D$4]/[.B19]+[$Settings.$D$4]*([.F19]/100)/[.C19])*1000+[$Settings.$C$4]" office:value-type="float" office:value="286.328560049185" calcext:value-type="float">
            <text:p>286,33</text:p>
          </table:table-cell>
        </table:table-row>
        <table:table-row table:style-name="ro1">
          <table:table-cell office:value-type="string" calcext:value-type="string">
            <text:p>brotli 1.2.0 -5</text:p>
          </table:table-cell>
          <table:table-cell office:value-type="float" office:value="73.71" calcext:value-type="float">
            <text:p>73,71</text:p>
          </table:table-cell>
          <table:table-cell office:value-type="float" office:value="617.55" calcext:value-type="float">
            <text:p>617,55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39095" calcext:value-type="float">
            <text:p>439095</text:p>
          </table:table-cell>
          <table:table-cell office:value-type="float" office:value="24.32" calcext:value-type="float">
            <text:p>24,32</text:p>
          </table:table-cell>
          <table:table-cell office:value-type="string" calcext:value-type="string">
            <text:p>1.js</text:p>
          </table:table-cell>
          <table:table-cell table:formula="of:=([$Settings.$D$4]*([.F20]/100)/[$Settings.$B$4]+[$Settings.$D$4]/[.B20]+[$Settings.$D$4]*([.F20]/100)/[.C20])*1000+[$Settings.$C$4]" office:value-type="float" office:value="267.160494499398" calcext:value-type="float">
            <text:p>267,16</text:p>
          </table:table-cell>
        </table:table-row>
        <table:table-row table:style-name="ro1">
          <table:table-cell office:value-type="string" calcext:value-type="string">
            <text:p>brotli 1.2.0 -6</text:p>
          </table:table-cell>
          <table:table-cell office:value-type="float" office:value="65.74" calcext:value-type="float">
            <text:p>65,74</text:p>
          </table:table-cell>
          <table:table-cell office:value-type="float" office:value="631.61" calcext:value-type="float">
            <text:p>631,61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33792" calcext:value-type="float">
            <text:p>433792</text:p>
          </table:table-cell>
          <table:table-cell office:value-type="float" office:value="24.02" calcext:value-type="float">
            <text:p>24,02</text:p>
          </table:table-cell>
          <table:table-cell office:value-type="string" calcext:value-type="string">
            <text:p>1.js</text:p>
          </table:table-cell>
          <table:table-cell table:formula="of:=([$Settings.$D$4]*([.F21]/100)/[$Settings.$B$4]+[$Settings.$D$4]/[.B21]+[$Settings.$D$4]*([.F21]/100)/[.C21])*1000+[$Settings.$C$4]" office:value-type="float" office:value="265.791736970813" calcext:value-type="float">
            <text:p>265,79</text:p>
          </table:table-cell>
        </table:table-row>
        <table:table-row table:style-name="ro1" table:visibility="collapse">
          <table:table-cell office:value-type="string" calcext:value-type="string">
            <text:p>brotli 1.2.0 -7</text:p>
          </table:table-cell>
          <table:table-cell office:value-type="float" office:value="42.94" calcext:value-type="float">
            <text:p>42,94</text:p>
          </table:table-cell>
          <table:table-cell office:value-type="float" office:value="635.92" calcext:value-type="float">
            <text:p>635,92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29276" calcext:value-type="float">
            <text:p>429276</text:p>
          </table:table-cell>
          <table:table-cell office:value-type="float" office:value="23.77" calcext:value-type="float">
            <text:p>23,77</text:p>
          </table:table-cell>
          <table:table-cell office:value-type="string" calcext:value-type="string">
            <text:p>1.js</text:p>
          </table:table-cell>
          <table:table-cell table:formula="of:=([$Settings.$D$4]*([.F22]/100)/[$Settings.$B$4]+[$Settings.$D$4]/[.B22]+[$Settings.$D$4]*([.F22]/100)/[.C22])*1000+[$Settings.$C$4]" office:value-type="float" office:value="271.362098424616" calcext:value-type="float">
            <text:p>271,36</text:p>
          </table:table-cell>
        </table:table-row>
        <table:table-row table:style-name="ro1" table:visibility="collapse">
          <table:table-cell office:value-type="string" calcext:value-type="string">
            <text:p>brotli 1.2.0 -8</text:p>
          </table:table-cell>
          <table:table-cell office:value-type="float" office:value="36.36" calcext:value-type="float">
            <text:p>36,36</text:p>
          </table:table-cell>
          <table:table-cell office:value-type="float" office:value="639.2" calcext:value-type="float">
            <text:p>639,2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27197" calcext:value-type="float">
            <text:p>427197</text:p>
          </table:table-cell>
          <table:table-cell office:value-type="float" office:value="23.66" calcext:value-type="float">
            <text:p>23,66</text:p>
          </table:table-cell>
          <table:table-cell office:value-type="string" calcext:value-type="string">
            <text:p>1.js</text:p>
          </table:table-cell>
          <table:table-cell table:formula="of:=([$Settings.$D$4]*([.F23]/100)/[$Settings.$B$4]+[$Settings.$D$4]/[.B23]+[$Settings.$D$4]*([.F23]/100)/[.C23])*1000+[$Settings.$C$4]" office:value-type="float" office:value="274.472900462762" calcext:value-type="float">
            <text:p>274,47</text:p>
          </table:table-cell>
        </table:table-row>
        <table:table-row table:style-name="ro1" table:visibility="collapse">
          <table:table-cell office:value-type="string" calcext:value-type="string">
            <text:p>brotli 1.2.0 -9</text:p>
          </table:table-cell>
          <table:table-cell office:value-type="float" office:value="24.39" calcext:value-type="float">
            <text:p>24,39</text:p>
          </table:table-cell>
          <table:table-cell office:value-type="float" office:value="639.76" calcext:value-type="float">
            <text:p>639,76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25445" calcext:value-type="float">
            <text:p>425445</text:p>
          </table:table-cell>
          <table:table-cell office:value-type="float" office:value="23.56" calcext:value-type="float">
            <text:p>23,56</text:p>
          </table:table-cell>
          <table:table-cell office:value-type="string" calcext:value-type="string">
            <text:p>1.js</text:p>
          </table:table-cell>
          <table:table-cell table:formula="of:=([$Settings.$D$4]*([.F24]/100)/[$Settings.$B$4]+[$Settings.$D$4]/[.B24]+[$Settings.$D$4]*([.F24]/100)/[.C24])*1000+[$Settings.$C$4]" office:value-type="float" office:value="286.968673102762" calcext:value-type="float">
            <text:p>286,97</text:p>
          </table:table-cell>
        </table:table-row>
        <table:table-row table:style-name="ro1" table:visibility="collapse">
          <table:table-cell office:value-type="string" calcext:value-type="string">
            <text:p>brotli 1.2.0 -10</text:p>
          </table:table-cell>
          <table:table-cell office:value-type="float" office:value="2.18" calcext:value-type="float">
            <text:p>2,18</text:p>
          </table:table-cell>
          <table:table-cell office:value-type="float" office:value="571.98" calcext:value-type="float">
            <text:p>571,98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393605" calcext:value-type="float">
            <text:p>393605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1.js</text:p>
          </table:table-cell>
          <table:table-cell table:formula="of:=([$Settings.$D$4]*([.F25]/100)/[$Settings.$B$4]+[$Settings.$D$4]/[.B25]+[$Settings.$D$4]*([.F25]/100)/[.C25])*1000+[$Settings.$C$4]" office:value-type="float" office:value="687.096728537695" calcext:value-type="float">
            <text:p>687,10</text:p>
          </table:table-cell>
        </table:table-row>
        <table:table-row table:style-name="ro1" table:visibility="collapse">
          <table:table-cell office:value-type="string" calcext:value-type="string">
            <text:p>brotli 1.2.0 -11</text:p>
          </table:table-cell>
          <table:table-cell office:value-type="float" office:value="0.89" calcext:value-type="float">
            <text:p>0,89</text:p>
          </table:table-cell>
          <table:table-cell office:value-type="float" office:value="637.55" calcext:value-type="float">
            <text:p>637,55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388310" calcext:value-type="float">
            <text:p>38831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1.js</text:p>
          </table:table-cell>
          <table:table-cell table:formula="of:=([$Settings.$D$4]*([.F26]/100)/[$Settings.$B$4]+[$Settings.$D$4]/[.B26]+[$Settings.$D$4]*([.F26]/100)/[.C26])*1000+[$Settings.$C$4]" office:value-type="float" office:value="1348.93273407065" calcext:value-type="float">
            <text:p>1348,93</text:p>
          </table:table-cell>
        </table:table-row>
        <table:table-row table:style-name="ro1">
          <table:table-cell office:value-type="string" calcext:value-type="string">
            <text:p>zstd 1.5.7 -1</text:p>
          </table:table-cell>
          <table:table-cell office:value-type="float" office:value="529.33" calcext:value-type="float">
            <text:p>529,33</text:p>
          </table:table-cell>
          <table:table-cell office:value-type="float" office:value="1754.71" calcext:value-type="float">
            <text:p>1754,71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560717" calcext:value-type="float">
            <text:p>560717</text:p>
          </table:table-cell>
          <table:table-cell office:value-type="float" office:value="31.05" calcext:value-type="float">
            <text:p>31,05</text:p>
          </table:table-cell>
          <table:table-cell office:value-type="string" calcext:value-type="string">
            <text:p>1.js</text:p>
          </table:table-cell>
          <table:table-cell table:formula="of:=([$Settings.$D$4]*([.F27]/100)/[$Settings.$B$4]+[$Settings.$D$4]/[.B27]+[$Settings.$D$4]*([.F27]/100)/[.C27])*1000+[$Settings.$C$4]" office:value-type="float" office:value="322.566132979254" calcext:value-type="float">
            <text:p>322,57</text:p>
          </table:table-cell>
        </table:table-row>
        <table:table-row table:style-name="ro1">
          <table:table-cell office:value-type="string" calcext:value-type="string">
            <text:p>zstd 1.5.7 -2</text:p>
          </table:table-cell>
          <table:table-cell office:value-type="float" office:value="415.27" calcext:value-type="float">
            <text:p>415,27</text:p>
          </table:table-cell>
          <table:table-cell office:value-type="float" office:value="1638.89" calcext:value-type="float">
            <text:p>1638,89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521503" calcext:value-type="float">
            <text:p>521503</text:p>
          </table:table-cell>
          <table:table-cell office:value-type="float" office:value="28.88" calcext:value-type="float">
            <text:p>28,88</text:p>
          </table:table-cell>
          <table:table-cell office:value-type="string" calcext:value-type="string">
            <text:p>1.js</text:p>
          </table:table-cell>
          <table:table-cell table:formula="of:=([$Settings.$D$4]*([.F28]/100)/[$Settings.$B$4]+[$Settings.$D$4]/[.B28]+[$Settings.$D$4]*([.F28]/100)/[.C28])*1000+[$Settings.$C$4]" office:value-type="float" office:value="301.384288686548" calcext:value-type="float">
            <text:p>301,38</text:p>
          </table:table-cell>
        </table:table-row>
        <table:table-row table:style-name="ro1">
          <table:table-cell office:value-type="string" calcext:value-type="string">
            <text:p>zstd 1.5.7 -3</text:p>
          </table:table-cell>
          <table:table-cell office:value-type="float" office:value="321.1" calcext:value-type="float">
            <text:p>321,1</text:p>
          </table:table-cell>
          <table:table-cell office:value-type="float" office:value="1591" calcext:value-type="float">
            <text:p>1591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93225" calcext:value-type="float">
            <text:p>493225</text:p>
          </table:table-cell>
          <table:table-cell office:value-type="float" office:value="27.31" calcext:value-type="float">
            <text:p>27,31</text:p>
          </table:table-cell>
          <table:table-cell office:value-type="string" calcext:value-type="string">
            <text:p>1.js</text:p>
          </table:table-cell>
          <table:table-cell table:formula="of:=([$Settings.$D$4]*([.F29]/100)/[$Settings.$B$4]+[$Settings.$D$4]/[.B29]+[$Settings.$D$4]*([.F29]/100)/[.C29])*1000+[$Settings.$C$4]" office:value-type="float" office:value="286.385947660668" calcext:value-type="float">
            <text:p>286,39</text:p>
          </table:table-cell>
        </table:table-row>
        <table:table-row table:style-name="ro1">
          <table:table-cell office:value-type="string" calcext:value-type="string">
            <text:p>zstd 1.5.7 -4</text:p>
          </table:table-cell>
          <table:table-cell office:value-type="float" office:value="307.08" calcext:value-type="float">
            <text:p>307,08</text:p>
          </table:table-cell>
          <table:table-cell office:value-type="float" office:value="1569.23" calcext:value-type="float">
            <text:p>1569,23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89988" calcext:value-type="float">
            <text:p>489988</text:p>
          </table:table-cell>
          <table:table-cell office:value-type="float" office:value="27.14" calcext:value-type="float">
            <text:p>27,14</text:p>
          </table:table-cell>
          <table:table-cell office:value-type="string" calcext:value-type="string">
            <text:p>1.js</text:p>
          </table:table-cell>
          <table:table-cell table:formula="of:=([$Settings.$D$4]*([.F30]/100)/[$Settings.$B$4]+[$Settings.$D$4]/[.B30]+[$Settings.$D$4]*([.F30]/100)/[.C30])*1000+[$Settings.$C$4]" office:value-type="float" office:value="284.82943146116" calcext:value-type="float">
            <text:p>284,83</text:p>
          </table:table-cell>
        </table:table-row>
        <table:table-row table:style-name="ro1">
          <table:table-cell office:value-type="string" calcext:value-type="string">
            <text:p>zstd 1.5.7 -5</text:p>
          </table:table-cell>
          <table:table-cell office:value-type="float" office:value="167.69" calcext:value-type="float">
            <text:p>167,69</text:p>
          </table:table-cell>
          <table:table-cell office:value-type="float" office:value="1533.69" calcext:value-type="float">
            <text:p>1533,69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67980" calcext:value-type="float">
            <text:p>467980</text:p>
          </table:table-cell>
          <table:table-cell office:value-type="float" office:value="25.92" calcext:value-type="float">
            <text:p>25,92</text:p>
          </table:table-cell>
          <table:table-cell office:value-type="string" calcext:value-type="string">
            <text:p>1.js</text:p>
          </table:table-cell>
          <table:table-cell table:formula="of:=([$Settings.$D$4]*([.F31]/100)/[$Settings.$B$4]+[$Settings.$D$4]/[.B31]+[$Settings.$D$4]*([.F31]/100)/[.C31])*1000+[$Settings.$C$4]" office:value-type="float" office:value="275.332388983645" calcext:value-type="float">
            <text:p>275,33</text:p>
          </table:table-cell>
        </table:table-row>
        <table:table-row table:style-name="ro1">
          <table:table-cell office:value-type="string" calcext:value-type="string">
            <text:p>zstd 1.5.7 -6</text:p>
          </table:table-cell>
          <table:table-cell office:value-type="float" office:value="122.4" calcext:value-type="float">
            <text:p>122,4</text:p>
          </table:table-cell>
          <table:table-cell office:value-type="float" office:value="1635.1" calcext:value-type="float">
            <text:p>1635,1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51251" calcext:value-type="float">
            <text:p>451251</text:p>
          </table:table-cell>
          <table:table-cell office:value-type="float" office:value="24.99" calcext:value-type="float">
            <text:p>24,99</text:p>
          </table:table-cell>
          <table:table-cell office:value-type="string" calcext:value-type="string">
            <text:p>1.js</text:p>
          </table:table-cell>
          <table:table-cell table:formula="of:=([$Settings.$D$4]*([.F32]/100)/[$Settings.$B$4]+[$Settings.$D$4]/[.B32]+[$Settings.$D$4]*([.F32]/100)/[.C32])*1000+[$Settings.$C$4]" office:value-type="float" office:value="268.222769329533" calcext:value-type="float">
            <text:p>268,22</text:p>
          </table:table-cell>
        </table:table-row>
        <table:table-row table:style-name="ro1">
          <table:table-cell office:value-type="string" calcext:value-type="string">
            <text:p>zstd 1.5.7 -7</text:p>
          </table:table-cell>
          <table:table-cell office:value-type="float" office:value="112.82" calcext:value-type="float">
            <text:p>112,82</text:p>
          </table:table-cell>
          <table:table-cell office:value-type="float" office:value="1639.57" calcext:value-type="float">
            <text:p>1639,57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46544" calcext:value-type="float">
            <text:p>446544</text:p>
          </table:table-cell>
          <table:table-cell office:value-type="float" office:value="24.73" calcext:value-type="float">
            <text:p>24,73</text:p>
          </table:table-cell>
          <table:table-cell office:value-type="string" calcext:value-type="string">
            <text:p>1.js</text:p>
          </table:table-cell>
          <table:table-cell table:formula="of:=([$Settings.$D$4]*([.F33]/100)/[$Settings.$B$4]+[$Settings.$D$4]/[.B33]+[$Settings.$D$4]*([.F33]/100)/[.C33])*1000+[$Settings.$C$4]" office:value-type="float" office:value="266.314508883478" calcext:value-type="float">
            <text:p>266,31</text:p>
          </table:table-cell>
        </table:table-row>
        <table:table-row table:style-name="ro1">
          <table:table-cell office:value-type="string" calcext:value-type="string">
            <text:p>zstd 1.5.7 -8</text:p>
          </table:table-cell>
          <table:table-cell office:value-type="float" office:value="89.8" calcext:value-type="float">
            <text:p>89,8</text:p>
          </table:table-cell>
          <table:table-cell office:value-type="float" office:value="1680.71" calcext:value-type="float">
            <text:p>1680,71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42233" calcext:value-type="float">
            <text:p>442233</text:p>
          </table:table-cell>
          <table:table-cell office:value-type="float" office:value="24.49" calcext:value-type="float">
            <text:p>24,49</text:p>
          </table:table-cell>
          <table:table-cell office:value-type="string" calcext:value-type="string">
            <text:p>1.js</text:p>
          </table:table-cell>
          <table:table-cell table:formula="of:=([$Settings.$D$4]*([.F34]/100)/[$Settings.$B$4]+[$Settings.$D$4]/[.B34]+[$Settings.$D$4]*([.F34]/100)/[.C34])*1000+[$Settings.$C$4]" office:value-type="float" office:value="266.181569689785" calcext:value-type="float">
            <text:p>266,18</text:p>
          </table:table-cell>
        </table:table-row>
        <table:table-row table:style-name="ro1">
          <table:table-cell office:value-type="string" calcext:value-type="string">
            <text:p>zstd 1.5.7 -9</text:p>
          </table:table-cell>
          <table:table-cell office:value-type="float" office:value="86.47" calcext:value-type="float">
            <text:p>86,47</text:p>
          </table:table-cell>
          <table:table-cell office:value-type="float" office:value="1679.89" calcext:value-type="float">
            <text:p>1679,89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41696" calcext:value-type="float">
            <text:p>441696</text:p>
          </table:table-cell>
          <table:table-cell office:value-type="float" office:value="24.46" calcext:value-type="float">
            <text:p>24,46</text:p>
          </table:table-cell>
          <table:table-cell office:value-type="string" calcext:value-type="string">
            <text:p>1.js</text:p>
          </table:table-cell>
          <table:table-cell table:formula="of:=([$Settings.$D$4]*([.F35]/100)/[$Settings.$B$4]+[$Settings.$D$4]/[.B35]+[$Settings.$D$4]*([.F35]/100)/[.C35])*1000+[$Settings.$C$4]" office:value-type="float" office:value="266.31030929354" calcext:value-type="float">
            <text:p>266,31</text:p>
          </table:table-cell>
        </table:table-row>
        <table:table-row table:style-name="ro1">
          <table:table-cell office:value-type="string" calcext:value-type="string">
            <text:p>zstd 1.5.7 -10</text:p>
          </table:table-cell>
          <table:table-cell office:value-type="float" office:value="67.44" calcext:value-type="float">
            <text:p>67,44</text:p>
          </table:table-cell>
          <table:table-cell office:value-type="float" office:value="1701.65" calcext:value-type="float">
            <text:p>1701,65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38985" calcext:value-type="float">
            <text:p>438985</text:p>
          </table:table-cell>
          <table:table-cell office:value-type="float" office:value="24.31" calcext:value-type="float">
            <text:p>24,31</text:p>
          </table:table-cell>
          <table:table-cell office:value-type="string" calcext:value-type="string">
            <text:p>1.js</text:p>
          </table:table-cell>
          <table:table-cell table:formula="of:=([$Settings.$D$4]*([.F36]/100)/[$Settings.$B$4]+[$Settings.$D$4]/[.B36]+[$Settings.$D$4]*([.F36]/100)/[.C36])*1000+[$Settings.$C$4]" office:value-type="float" office:value="268.070856595505" calcext:value-type="float">
            <text:p>268,07</text:p>
          </table:table-cell>
        </table:table-row>
        <table:table-row table:style-name="ro1">
          <table:table-cell office:value-type="string" calcext:value-type="string">
            <text:p>zstd 1.5.7 -11</text:p>
          </table:table-cell>
          <table:table-cell office:value-type="float" office:value="51.91" calcext:value-type="float">
            <text:p>51,91</text:p>
          </table:table-cell>
          <table:table-cell office:value-type="float" office:value="1715.62" calcext:value-type="float">
            <text:p>1715,62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37614" calcext:value-type="float">
            <text:p>437614</text:p>
          </table:table-cell>
          <table:table-cell office:value-type="float" office:value="24.24" calcext:value-type="float">
            <text:p>24,24</text:p>
          </table:table-cell>
          <table:table-cell office:value-type="string" calcext:value-type="string">
            <text:p>1.js</text:p>
          </table:table-cell>
          <table:table-cell table:formula="of:=([$Settings.$D$4]*([.F37]/100)/[$Settings.$B$4]+[$Settings.$D$4]/[.B37]+[$Settings.$D$4]*([.F37]/100)/[.C37])*1000+[$Settings.$C$4]" office:value-type="float" office:value="271.80540099054" calcext:value-type="float">
            <text:p>271,81</text:p>
          </table:table-cell>
        </table:table-row>
        <table:table-row table:style-name="ro1">
          <table:table-cell office:value-type="string" calcext:value-type="string">
            <text:p>zstd 1.5.7 -12</text:p>
          </table:table-cell>
          <table:table-cell office:value-type="float" office:value="51.44" calcext:value-type="float">
            <text:p>51,44</text:p>
          </table:table-cell>
          <table:table-cell office:value-type="float" office:value="1717.03" calcext:value-type="float">
            <text:p>1717,03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37614" calcext:value-type="float">
            <text:p>437614</text:p>
          </table:table-cell>
          <table:table-cell office:value-type="float" office:value="24.24" calcext:value-type="float">
            <text:p>24,24</text:p>
          </table:table-cell>
          <table:table-cell office:value-type="string" calcext:value-type="string">
            <text:p>1.js</text:p>
          </table:table-cell>
          <table:table-cell table:formula="of:=([$Settings.$D$4]*([.F38]/100)/[$Settings.$B$4]+[$Settings.$D$4]/[.B38]+[$Settings.$D$4]*([.F38]/100)/[.C38])*1000+[$Settings.$C$4]" office:value-type="float" office:value="271.981298420745" calcext:value-type="float">
            <text:p>271,98</text:p>
          </table:table-cell>
        </table:table-row>
        <table:table-row table:style-name="ro1" table:visibility="collapse">
          <table:table-cell office:value-type="string" calcext:value-type="string">
            <text:p>zstd 1.5.7 -13</text:p>
          </table:table-cell>
          <table:table-cell office:value-type="float" office:value="25.31" calcext:value-type="float">
            <text:p>25,31</text:p>
          </table:table-cell>
          <table:table-cell office:value-type="float" office:value="1715.25" calcext:value-type="float">
            <text:p>1715,25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34160" calcext:value-type="float">
            <text:p>434160</text:p>
          </table:table-cell>
          <table:table-cell office:value-type="float" office:value="24.04" calcext:value-type="float">
            <text:p>24,04</text:p>
          </table:table-cell>
          <table:table-cell office:value-type="string" calcext:value-type="string">
            <text:p>1.js</text:p>
          </table:table-cell>
          <table:table-cell table:formula="of:=([$Settings.$D$4]*([.F39]/100)/[$Settings.$B$4]+[$Settings.$D$4]/[.B39]+[$Settings.$D$4]*([.F39]/100)/[.C39])*1000+[$Settings.$C$4]" office:value-type="float" office:value="290.050229565572" calcext:value-type="float">
            <text:p>290,05</text:p>
          </table:table-cell>
        </table:table-row>
        <table:table-row table:style-name="ro1" table:visibility="collapse">
          <table:table-cell office:value-type="string" calcext:value-type="string">
            <text:p>zstd 1.5.7 -14</text:p>
          </table:table-cell>
          <table:table-cell office:value-type="float" office:value="21.99" calcext:value-type="float">
            <text:p>21,99</text:p>
          </table:table-cell>
          <table:table-cell office:value-type="float" office:value="1722.63" calcext:value-type="float">
            <text:p>1722,63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32829" calcext:value-type="float">
            <text:p>432829</text:p>
          </table:table-cell>
          <table:table-cell office:value-type="float" office:value="23.97" calcext:value-type="float">
            <text:p>23,97</text:p>
          </table:table-cell>
          <table:table-cell office:value-type="string" calcext:value-type="string">
            <text:p>1.js</text:p>
          </table:table-cell>
          <table:table-cell table:formula="of:=([$Settings.$D$4]*([.F40]/100)/[$Settings.$B$4]+[$Settings.$D$4]/[.B40]+[$Settings.$D$4]*([.F40]/100)/[.C40])*1000+[$Settings.$C$4]" office:value-type="float" office:value="295.314363705853" calcext:value-type="float">
            <text:p>295,31</text:p>
          </table:table-cell>
        </table:table-row>
        <table:table-row table:style-name="ro1" table:visibility="collapse">
          <table:table-cell office:value-type="string" calcext:value-type="string">
            <text:p>zstd 1.5.7 -15</text:p>
          </table:table-cell>
          <table:table-cell office:value-type="float" office:value="21.2" calcext:value-type="float">
            <text:p>21,2</text:p>
          </table:table-cell>
          <table:table-cell office:value-type="float" office:value="1726.37" calcext:value-type="float">
            <text:p>1726,37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32452" calcext:value-type="float">
            <text:p>432452</text:p>
          </table:table-cell>
          <table:table-cell office:value-type="float" office:value="23.95" calcext:value-type="float">
            <text:p>23,95</text:p>
          </table:table-cell>
          <table:table-cell office:value-type="string" calcext:value-type="string">
            <text:p>1.js</text:p>
          </table:table-cell>
          <table:table-cell table:formula="of:=([$Settings.$D$4]*([.F41]/100)/[$Settings.$B$4]+[$Settings.$D$4]/[.B41]+[$Settings.$D$4]*([.F41]/100)/[.C41])*1000+[$Settings.$C$4]" office:value-type="float" office:value="296.808541720379" calcext:value-type="float">
            <text:p>296,81</text:p>
          </table:table-cell>
        </table:table-row>
        <table:table-row table:style-name="ro1" table:visibility="collapse">
          <table:table-cell office:value-type="string" calcext:value-type="string">
            <text:p>zstd 1.5.7 -16</text:p>
          </table:table-cell>
          <table:table-cell office:value-type="float" office:value="11.09" calcext:value-type="float">
            <text:p>11,09</text:p>
          </table:table-cell>
          <table:table-cell office:value-type="float" office:value="1667.97" calcext:value-type="float">
            <text:p>1667,97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18705" calcext:value-type="float">
            <text:p>418705</text:p>
          </table:table-cell>
          <table:table-cell office:value-type="float" office:value="23.19" calcext:value-type="float">
            <text:p>23,19</text:p>
          </table:table-cell>
          <table:table-cell office:value-type="string" calcext:value-type="string">
            <text:p>1.js</text:p>
          </table:table-cell>
          <table:table-cell table:formula="of:=([$Settings.$D$4]*([.F42]/100)/[$Settings.$B$4]+[$Settings.$D$4]/[.B42]+[$Settings.$D$4]*([.F42]/100)/[.C42])*1000+[$Settings.$C$4]" office:value-type="float" office:value="332.210356796026" calcext:value-type="float">
            <text:p>332,21</text:p>
          </table:table-cell>
        </table:table-row>
        <table:table-row table:style-name="ro1" table:visibility="collapse">
          <table:table-cell office:value-type="string" calcext:value-type="string">
            <text:p>zstd 1.5.7 -17</text:p>
          </table:table-cell>
          <table:table-cell office:value-type="float" office:value="10" calcext:value-type="float">
            <text:p>10</text:p>
          </table:table-cell>
          <table:table-cell office:value-type="float" office:value="1599.69" calcext:value-type="float">
            <text:p>1599,69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12985" calcext:value-type="float">
            <text:p>412985</text:p>
          </table:table-cell>
          <table:table-cell office:value-type="float" office:value="22.87" calcext:value-type="float">
            <text:p>22,87</text:p>
          </table:table-cell>
          <table:table-cell office:value-type="string" calcext:value-type="string">
            <text:p>1.js</text:p>
          </table:table-cell>
          <table:table-cell table:formula="of:=([$Settings.$D$4]*([.F43]/100)/[$Settings.$B$4]+[$Settings.$D$4]/[.B43]+[$Settings.$D$4]*([.F43]/100)/[.C43])*1000+[$Settings.$C$4]" office:value-type="float" office:value="338.842965199507" calcext:value-type="float">
            <text:p>338,84</text:p>
          </table:table-cell>
        </table:table-row>
        <table:table-row table:style-name="ro1" table:visibility="collapse">
          <table:table-cell office:value-type="string" calcext:value-type="string">
            <text:p>zstd 1.5.7 -18</text:p>
          </table:table-cell>
          <table:table-cell office:value-type="float" office:value="6.5" calcext:value-type="float">
            <text:p>6,5</text:p>
          </table:table-cell>
          <table:table-cell office:value-type="float" office:value="1510.99" calcext:value-type="float">
            <text:p>1510,99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09236" calcext:value-type="float">
            <text:p>409236</text:p>
          </table:table-cell>
          <table:table-cell office:value-type="float" office:value="22.66" calcext:value-type="float">
            <text:p>22,66</text:p>
          </table:table-cell>
          <table:table-cell office:value-type="string" calcext:value-type="string">
            <text:p>1.js</text:p>
          </table:table-cell>
          <table:table-cell table:formula="of:=([$Settings.$D$4]*([.F44]/100)/[$Settings.$B$4]+[$Settings.$D$4]/[.B44]+[$Settings.$D$4]*([.F44]/100)/[.C44])*1000+[$Settings.$C$4]" office:value-type="float" office:value="390.596121747993" calcext:value-type="float">
            <text:p>390,60</text:p>
          </table:table-cell>
        </table:table-row>
        <table:table-row table:style-name="ro1" table:visibility="collapse">
          <table:table-cell office:value-type="string" calcext:value-type="string">
            <text:p>zstd 1.5.7 -19</text:p>
          </table:table-cell>
          <table:table-cell office:value-type="float" office:value="5.35" calcext:value-type="float">
            <text:p>5,35</text:p>
          </table:table-cell>
          <table:table-cell office:value-type="float" office:value="1519.35" calcext:value-type="float">
            <text:p>1519,35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08658" calcext:value-type="float">
            <text:p>408658</text:p>
          </table:table-cell>
          <table:table-cell office:value-type="float" office:value="22.63" calcext:value-type="float">
            <text:p>22,63</text:p>
          </table:table-cell>
          <table:table-cell office:value-type="string" calcext:value-type="string">
            <text:p>1.js</text:p>
          </table:table-cell>
          <table:table-cell table:formula="of:=([$Settings.$D$4]*([.F45]/100)/[$Settings.$B$4]+[$Settings.$D$4]/[.B45]+[$Settings.$D$4]*([.F45]/100)/[.C45])*1000+[$Settings.$C$4]" office:value-type="float" office:value="423.364833123117" calcext:value-type="float">
            <text:p>423,36</text:p>
          </table:table-cell>
        </table:table-row>
        <table:table-row table:style-name="ro1" table:visibility="collapse">
          <table:table-cell office:value-type="string" calcext:value-type="string">
            <text:p>zstd 1.5.7 -20</text:p>
          </table:table-cell>
          <table:table-cell office:value-type="float" office:value="5.3" calcext:value-type="float">
            <text:p>5,3</text:p>
          </table:table-cell>
          <table:table-cell office:value-type="float" office:value="1520.88" calcext:value-type="float">
            <text:p>1520,88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08658" calcext:value-type="float">
            <text:p>408658</text:p>
          </table:table-cell>
          <table:table-cell office:value-type="float" office:value="22.63" calcext:value-type="float">
            <text:p>22,63</text:p>
          </table:table-cell>
          <table:table-cell office:value-type="string" calcext:value-type="string">
            <text:p>1.js</text:p>
          </table:table-cell>
          <table:table-cell table:formula="of:=([$Settings.$D$4]*([.F46]/100)/[$Settings.$B$4]+[$Settings.$D$4]/[.B46]+[$Settings.$D$4]*([.F46]/100)/[.C46])*1000+[$Settings.$C$4]" office:value-type="float" office:value="425.128040717241" calcext:value-type="float">
            <text:p>425,13</text:p>
          </table:table-cell>
        </table:table-row>
        <table:table-row table:style-name="ro1" table:visibility="collapse">
          <table:table-cell office:value-type="string" calcext:value-type="string">
            <text:p>zstd 1.5.7 -21</text:p>
          </table:table-cell>
          <table:table-cell office:value-type="float" office:value="5.21" calcext:value-type="float">
            <text:p>5,21</text:p>
          </table:table-cell>
          <table:table-cell office:value-type="float" office:value="1522.02" calcext:value-type="float">
            <text:p>1522,02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08644" calcext:value-type="float">
            <text:p>408644</text:p>
          </table:table-cell>
          <table:table-cell office:value-type="float" office:value="22.63" calcext:value-type="float">
            <text:p>22,63</text:p>
          </table:table-cell>
          <table:table-cell office:value-type="string" calcext:value-type="string">
            <text:p>1.js</text:p>
          </table:table-cell>
          <table:table-cell table:formula="of:=([$Settings.$D$4]*([.F47]/100)/[$Settings.$B$4]+[$Settings.$D$4]/[.B47]+[$Settings.$D$4]*([.F47]/100)/[.C47])*1000+[$Settings.$C$4]" office:value-type="float" office:value="428.387263640266" calcext:value-type="float">
            <text:p>428,39</text:p>
          </table:table-cell>
        </table:table-row>
        <table:table-row table:style-name="ro1" table:visibility="collapse">
          <table:table-cell office:value-type="string" calcext:value-type="string">
            <text:p>zstd 1.5.7 -22</text:p>
          </table:table-cell>
          <table:table-cell office:value-type="float" office:value="5.13" calcext:value-type="float">
            <text:p>5,13</text:p>
          </table:table-cell>
          <table:table-cell office:value-type="float" office:value="1528.74" calcext:value-type="float">
            <text:p>1528,74</text:p>
          </table:table-cell>
          <table:table-cell office:value-type="float" office:value="1805701" calcext:value-type="float">
            <text:p>1805701</text:p>
          </table:table-cell>
          <table:table-cell office:value-type="float" office:value="408638" calcext:value-type="float">
            <text:p>408638</text:p>
          </table:table-cell>
          <table:table-cell office:value-type="float" office:value="22.63" calcext:value-type="float">
            <text:p>22,63</text:p>
          </table:table-cell>
          <table:table-cell office:value-type="string" calcext:value-type="string">
            <text:p>1.js</text:p>
          </table:table-cell>
          <table:table-cell table:formula="of:=([$Settings.$D$4]*([.F48]/100)/[$Settings.$B$4]+[$Settings.$D$4]/[.B48]+[$Settings.$D$4]*([.F48]/100)/[.C48])*1000+[$Settings.$C$4]" office:value-type="float" office:value="431.379804283266" calcext:value-type="float">
            <text:p>431,38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>
            <draw:frame draw:z-index="0" draw:style-name="gr1" draw:text-style-name="P1" svg:width="25.659cm" svg:height="16.983cm" svg:x="0cm" svg:y="0.101cm">
              <draw:object draw:notify-on-update-of-ranges="JS.A5:JS.A5 JS.A6:JS.A48 JS.H5:JS.H5 JS.H6:JS.H4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style-name="Default"/>
        </table:table-row>
      </table:table>
      <table:table table:name="Settings" table:style-name="ta1"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andwidth (MB/s)</text:p>
          </table:table-cell>
          <table:table-cell table:style-name="ce2" office:value-type="string" calcext:value-type="string">
            <text:p>Latency (ms)</text:p>
          </table:table-cell>
          <table:table-cell table:style-name="ce2" office:value-type="string" calcext:value-type="string">
            <text:p>Size (MB)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1" calcext:value-type="float">
            <text:p>1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.00.0000</text:date>, <text:time style:data-style-name="N2" text:time-value="10:10:19.813519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Николай Лавлинский</meta:initial-creator>
    <meta:creation-date>2026-05-13T18:16:14.170714395</meta:creation-date>
    <meta:generator>LibreOffice/24.2.7.2$Linux_X86_64 LibreOffice_project/420$Build-2</meta:generator>
    <dc:date>2026-05-14T15:17:48.622346308</dc:date>
    <dc:creator>Николай Лавлинский</dc:creator>
    <meta:editing-duration>PT5H22M41S</meta:editing-duration>
    <meta:editing-cycles>61</meta:editing-cycles>
    <meta:document-statistic meta:table-count="4" meta:cell-count="106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6cm" svg:height="16.984cm" xlink:href=".." xlink:type="simple" chart:class="chart:bar" chart:style-name="ch1">
        <chart:legend chart:legend-position="end" svg:x="22.63cm" svg:y="8.193cm" style:legend-expansion="high" chart:style-name="ch2"/>
        <chart:plot-area chart:style-name="ch3" table:cell-range-address="HTML.A5:HTML.A48 HTML.H5:HTML.H48" chart:data-source-has-labels="both" svg:x="0.513cm" svg:y="0.339cm" svg:width="21.604cm" svg:height="16.306cm">
          <chart:coordinate-region svg:x="1.796cm" svg:y="0.538cm" svg:width="20.321cm" svg:height="14.174cm"/>
          <chart:axis chart:dimension="x" chart:name="primary-x" chart:style-name="ch4" chartooo:axis-type="auto">
            <chartooo:date-scale/>
            <chart:categories table:cell-range-address="HTML.A6:HTML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TML.H6:HTML.H48" chart:label-cell-address="HTML.H5:HTML.H5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(ms)</text:p>
                <draw:g>
                  <svg:desc>HTML.H5:HTML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lib 1.3.1 -1</text:p>
                <draw:g>
                  <svg:desc>HTML.A6:HTML.A48</svg:desc>
                </draw:g>
              </table:table-cell>
              <table:table-cell office:value-type="float" office:value="379.435870053338">
                <text:p>379.435870053338</text:p>
                <draw:g>
                  <svg:desc>HTML.H6:HTML.H48</svg:desc>
                </draw:g>
              </table:table-cell>
            </table:table-row>
            <table:table-row>
              <table:table-cell office:value-type="string">
                <text:p>zlib 1.3.1 -2</text:p>
              </table:table-cell>
              <table:table-cell office:value-type="float" office:value="362.429889162439">
                <text:p>362.429889162439</text:p>
              </table:table-cell>
            </table:table-row>
            <table:table-row>
              <table:table-cell office:value-type="string">
                <text:p>zlib 1.3.1 -3</text:p>
              </table:table-cell>
              <table:table-cell office:value-type="float" office:value="350.276414804637">
                <text:p>350.276414804637</text:p>
              </table:table-cell>
            </table:table-row>
            <table:table-row>
              <table:table-cell office:value-type="string">
                <text:p>zlib 1.3.1 -4</text:p>
              </table:table-cell>
              <table:table-cell office:value-type="float" office:value="336.35521542518">
                <text:p>336.35521542518</text:p>
              </table:table-cell>
            </table:table-row>
            <table:table-row>
              <table:table-cell office:value-type="string">
                <text:p>zlib 1.3.1 -5</text:p>
              </table:table-cell>
              <table:table-cell office:value-type="float" office:value="328.796249929688">
                <text:p>328.796249929688</text:p>
              </table:table-cell>
            </table:table-row>
            <table:table-row>
              <table:table-cell office:value-type="string">
                <text:p>brotli 1.2.0 -0</text:p>
              </table:table-cell>
              <table:table-cell office:value-type="float" office:value="364.493407755151">
                <text:p>364.493407755151</text:p>
              </table:table-cell>
            </table:table-row>
            <table:table-row>
              <table:table-cell office:value-type="string">
                <text:p>brotli 1.2.0 -1</text:p>
              </table:table-cell>
              <table:table-cell office:value-type="float" office:value="339.178463842658">
                <text:p>339.178463842658</text:p>
              </table:table-cell>
            </table:table-row>
            <table:table-row>
              <table:table-cell office:value-type="string">
                <text:p>brotli 1.2.0 -2</text:p>
              </table:table-cell>
              <table:table-cell office:value-type="float" office:value="322.200371337249">
                <text:p>322.200371337249</text:p>
              </table:table-cell>
            </table:table-row>
            <table:table-row>
              <table:table-cell office:value-type="string">
                <text:p>brotli 1.2.0 -3</text:p>
              </table:table-cell>
              <table:table-cell office:value-type="float" office:value="317.452135875642">
                <text:p>317.452135875642</text:p>
              </table:table-cell>
            </table:table-row>
            <table:table-row>
              <table:table-cell office:value-type="string">
                <text:p>brotli 1.2.0 -4</text:p>
              </table:table-cell>
              <table:table-cell office:value-type="float" office:value="285.814174461502">
                <text:p>285.814174461502</text:p>
              </table:table-cell>
            </table:table-row>
            <table:table-row>
              <table:table-cell office:value-type="string">
                <text:p>brotli 1.2.0 -5</text:p>
              </table:table-cell>
              <table:table-cell office:value-type="float" office:value="281.533673568045">
                <text:p>281.533673568045</text:p>
              </table:table-cell>
            </table:table-row>
            <table:table-row>
              <table:table-cell office:value-type="string">
                <text:p>brotli 1.2.0 -6</text:p>
              </table:table-cell>
              <table:table-cell office:value-type="float" office:value="277.814035792507">
                <text:p>277.814035792507</text:p>
              </table:table-cell>
            </table:table-row>
            <table:table-row>
              <table:table-cell office:value-type="string">
                <text:p>zstd 1.5.7 -1</text:p>
              </table:table-cell>
              <table:table-cell office:value-type="float" office:value="341.856617692548">
                <text:p>341.856617692548</text:p>
              </table:table-cell>
            </table:table-row>
            <table:table-row>
              <table:table-cell office:value-type="string">
                <text:p>zstd 1.5.7 -2</text:p>
              </table:table-cell>
              <table:table-cell office:value-type="float" office:value="322.045852071895">
                <text:p>322.045852071895</text:p>
              </table:table-cell>
            </table:table-row>
            <table:table-row>
              <table:table-cell office:value-type="string">
                <text:p>zstd 1.5.7 -3</text:p>
              </table:table-cell>
              <table:table-cell office:value-type="float" office:value="305.893997286892">
                <text:p>305.893997286892</text:p>
              </table:table-cell>
            </table:table-row>
            <table:table-row>
              <table:table-cell office:value-type="string">
                <text:p>zstd 1.5.7 -4</text:p>
              </table:table-cell>
              <table:table-cell office:value-type="float" office:value="301.38157894878">
                <text:p>301.38157894878</text:p>
              </table:table-cell>
            </table:table-row>
            <table:table-row>
              <table:table-cell office:value-type="string">
                <text:p>zstd 1.5.7 -5</text:p>
              </table:table-cell>
              <table:table-cell office:value-type="float" office:value="287.115649731855">
                <text:p>287.115649731855</text:p>
              </table:table-cell>
            </table:table-row>
            <table:table-row>
              <table:table-cell office:value-type="string">
                <text:p>zstd 1.5.7 -6</text:p>
              </table:table-cell>
              <table:table-cell office:value-type="float" office:value="280.043723044067">
                <text:p>280.043723044067</text:p>
              </table:table-cell>
            </table:table-row>
            <table:table-row>
              <table:table-cell office:value-type="string">
                <text:p>zstd 1.5.7 -7</text:p>
              </table:table-cell>
              <table:table-cell office:value-type="float" office:value="275.313073532092">
                <text:p>275.313073532092</text:p>
              </table:table-cell>
            </table:table-row>
            <table:table-row>
              <table:table-cell office:value-type="string">
                <text:p>zstd 1.5.7 -8</text:p>
              </table:table-cell>
              <table:table-cell office:value-type="float" office:value="275.310865061781">
                <text:p>275.310865061781</text:p>
              </table:table-cell>
            </table:table-row>
            <table:table-row>
              <table:table-cell office:value-type="string">
                <text:p>zstd 1.5.7 -9</text:p>
              </table:table-cell>
              <table:table-cell office:value-type="float" office:value="272.2239837507">
                <text:p>272.2239837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6cm" svg:height="16.984cm" xlink:href=".." xlink:type="simple" chart:class="chart:bar" chart:style-name="ch1">
        <chart:legend chart:legend-position="end" svg:x="22.63cm" svg:y="8.193cm" style:legend-expansion="high" chart:style-name="ch2"/>
        <chart:plot-area chart:style-name="ch3" table:cell-range-address="CSS.A5:CSS.A48 CSS.H5:CSS.H48" chart:data-source-has-labels="both" svg:x="0.513cm" svg:y="0.339cm" svg:width="21.604cm" svg:height="16.306cm">
          <chart:coordinate-region svg:x="1.796cm" svg:y="0.538cm" svg:width="20.321cm" svg:height="14.117cm"/>
          <chart:axis chart:dimension="x" chart:name="primary-x" chart:style-name="ch4" chartooo:axis-type="auto">
            <chartooo:date-scale/>
            <chart:categories table:cell-range-address="CSS.A6:CSS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SS.H6:CSS.H48" chart:label-cell-address="CSS.H5:CSS.H5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(ms)</text:p>
                <draw:g>
                  <svg:desc>CSS.H5:CSS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lib 1.3.1 -1</text:p>
                <draw:g>
                  <svg:desc>CSS.A6:CSS.A48</svg:desc>
                </draw:g>
              </table:table-cell>
              <table:table-cell office:value-type="float" office:value="416.447237936093">
                <text:p>416.447237936093</text:p>
                <draw:g>
                  <svg:desc>CSS.H6:CSS.H48</svg:desc>
                </draw:g>
              </table:table-cell>
            </table:table-row>
            <table:table-row>
              <table:table-cell office:value-type="string">
                <text:p>zlib 1.3.1 -2</text:p>
              </table:table-cell>
              <table:table-cell office:value-type="float" office:value="409.39927105465">
                <text:p>409.39927105465</text:p>
              </table:table-cell>
            </table:table-row>
            <table:table-row>
              <table:table-cell office:value-type="string">
                <text:p>zlib 1.3.1 -3</text:p>
              </table:table-cell>
              <table:table-cell office:value-type="float" office:value="404.971449576697">
                <text:p>404.971449576697</text:p>
              </table:table-cell>
            </table:table-row>
            <table:table-row>
              <table:table-cell office:value-type="string">
                <text:p>zlib 1.3.1 -4</text:p>
              </table:table-cell>
              <table:table-cell office:value-type="float" office:value="389.883000272576">
                <text:p>389.883000272576</text:p>
              </table:table-cell>
            </table:table-row>
            <table:table-row>
              <table:table-cell office:value-type="string">
                <text:p>zlib 1.3.1 -5</text:p>
              </table:table-cell>
              <table:table-cell office:value-type="float" office:value="385.083042517064">
                <text:p>385.083042517064</text:p>
              </table:table-cell>
            </table:table-row>
            <table:table-row>
              <table:table-cell office:value-type="string">
                <text:p>zlib 1.3.1 -6</text:p>
              </table:table-cell>
              <table:table-cell office:value-type="float" office:value="385.673920190621">
                <text:p>385.673920190621</text:p>
              </table:table-cell>
            </table:table-row>
            <table:table-row>
              <table:table-cell office:value-type="string">
                <text:p>zlib 1.3.1 -7</text:p>
              </table:table-cell>
              <table:table-cell office:value-type="float" office:value="386.78576424213">
                <text:p>386.78576424213</text:p>
              </table:table-cell>
            </table:table-row>
            <table:table-row>
              <table:table-cell office:value-type="string">
                <text:p>brotli 1.2.0 -0</text:p>
              </table:table-cell>
              <table:table-cell office:value-type="float" office:value="403.205359661489">
                <text:p>403.205359661489</text:p>
              </table:table-cell>
            </table:table-row>
            <table:table-row>
              <table:table-cell office:value-type="string">
                <text:p>brotli 1.2.0 -1</text:p>
              </table:table-cell>
              <table:table-cell office:value-type="float" office:value="389.079622222224">
                <text:p>389.079622222224</text:p>
              </table:table-cell>
            </table:table-row>
            <table:table-row>
              <table:table-cell office:value-type="string">
                <text:p>brotli 1.2.0 -2</text:p>
              </table:table-cell>
              <table:table-cell office:value-type="float" office:value="379.582650208734">
                <text:p>379.582650208734</text:p>
              </table:table-cell>
            </table:table-row>
            <table:table-row>
              <table:table-cell office:value-type="string">
                <text:p>brotli 1.2.0 -3</text:p>
              </table:table-cell>
              <table:table-cell office:value-type="float" office:value="374.547590523625">
                <text:p>374.547590523625</text:p>
              </table:table-cell>
            </table:table-row>
            <table:table-row>
              <table:table-cell office:value-type="string">
                <text:p>brotli 1.2.0 -4</text:p>
              </table:table-cell>
              <table:table-cell office:value-type="float" office:value="370.342620908081">
                <text:p>370.342620908081</text:p>
              </table:table-cell>
            </table:table-row>
            <table:table-row>
              <table:table-cell office:value-type="string">
                <text:p>brotli 1.2.0 -5</text:p>
              </table:table-cell>
              <table:table-cell office:value-type="float" office:value="364.791837093938">
                <text:p>364.791837093938</text:p>
              </table:table-cell>
            </table:table-row>
            <table:table-row>
              <table:table-cell office:value-type="string">
                <text:p>brotli 1.2.0 -6</text:p>
              </table:table-cell>
              <table:table-cell office:value-type="float" office:value="363.391238585365">
                <text:p>363.391238585365</text:p>
              </table:table-cell>
            </table:table-row>
            <table:table-row>
              <table:table-cell office:value-type="string">
                <text:p>brotli 1.2.0 -7</text:p>
              </table:table-cell>
              <table:table-cell office:value-type="float" office:value="363.297771238948">
                <text:p>363.297771238948</text:p>
              </table:table-cell>
            </table:table-row>
            <table:table-row>
              <table:table-cell office:value-type="string">
                <text:p>brotli 1.2.0 -8</text:p>
              </table:table-cell>
              <table:table-cell office:value-type="float" office:value="364.315543175288">
                <text:p>364.315543175288</text:p>
              </table:table-cell>
            </table:table-row>
            <table:table-row>
              <table:table-cell office:value-type="string">
                <text:p>zstd 1.5.7 -1</text:p>
              </table:table-cell>
              <table:table-cell office:value-type="float" office:value="394.516209280682">
                <text:p>394.516209280682</text:p>
              </table:table-cell>
            </table:table-row>
            <table:table-row>
              <table:table-cell office:value-type="string">
                <text:p>zstd 1.5.7 -2</text:p>
              </table:table-cell>
              <table:table-cell office:value-type="float" office:value="386.17522658268">
                <text:p>386.17522658268</text:p>
              </table:table-cell>
            </table:table-row>
            <table:table-row>
              <table:table-cell office:value-type="string">
                <text:p>zstd 1.5.7 -3</text:p>
              </table:table-cell>
              <table:table-cell office:value-type="float" office:value="374.695016339383">
                <text:p>374.695016339383</text:p>
              </table:table-cell>
            </table:table-row>
            <table:table-row>
              <table:table-cell office:value-type="string">
                <text:p>zstd 1.5.7 -4</text:p>
              </table:table-cell>
              <table:table-cell office:value-type="float" office:value="374.653158693843">
                <text:p>374.653158693843</text:p>
              </table:table-cell>
            </table:table-row>
            <table:table-row>
              <table:table-cell office:value-type="string">
                <text:p>zstd 1.5.7 -5</text:p>
              </table:table-cell>
              <table:table-cell office:value-type="float" office:value="364.911568160737">
                <text:p>364.911568160737</text:p>
              </table:table-cell>
            </table:table-row>
            <table:table-row>
              <table:table-cell office:value-type="string">
                <text:p>zstd 1.5.7 -6</text:p>
              </table:table-cell>
              <table:table-cell office:value-type="float" office:value="361.906226595161">
                <text:p>361.906226595161</text:p>
              </table:table-cell>
            </table:table-row>
            <table:table-row>
              <table:table-cell office:value-type="string">
                <text:p>zstd 1.5.7 -7</text:p>
              </table:table-cell>
              <table:table-cell office:value-type="float" office:value="360.361606389456">
                <text:p>360.361606389456</text:p>
              </table:table-cell>
            </table:table-row>
            <table:table-row>
              <table:table-cell office:value-type="string">
                <text:p>zstd 1.5.7 -8</text:p>
              </table:table-cell>
              <table:table-cell office:value-type="float" office:value="360.481879256682">
                <text:p>360.481879256682</text:p>
              </table:table-cell>
            </table:table-row>
            <table:table-row>
              <table:table-cell office:value-type="string">
                <text:p>zstd 1.5.7 -9</text:p>
              </table:table-cell>
              <table:table-cell office:value-type="float" office:value="360.579945695494">
                <text:p>360.579945695494</text:p>
              </table:table-cell>
            </table:table-row>
            <table:table-row>
              <table:table-cell office:value-type="string">
                <text:p>zstd 1.5.7 -10</text:p>
              </table:table-cell>
              <table:table-cell office:value-type="float" office:value="360.425537781013">
                <text:p>360.425537781013</text:p>
              </table:table-cell>
            </table:table-row>
            <table:table-row>
              <table:table-cell office:value-type="string">
                <text:p>zstd 1.5.7 -11</text:p>
              </table:table-cell>
              <table:table-cell office:value-type="float" office:value="362.384037408205">
                <text:p>362.384037408205</text:p>
              </table:table-cell>
            </table:table-row>
            <table:table-row>
              <table:table-cell office:value-type="string">
                <text:p>zstd 1.5.7 -12</text:p>
              </table:table-cell>
              <table:table-cell office:value-type="float" office:value="362.128160679782">
                <text:p>362.128160679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6cm" svg:height="16.984cm" xlink:href=".." xlink:type="simple" chart:class="chart:bar" chart:style-name="ch1">
        <chart:legend chart:legend-position="end" svg:x="22.63cm" svg:y="8.193cm" style:legend-expansion="high" chart:style-name="ch2"/>
        <chart:plot-area chart:style-name="ch3" table:cell-range-address="JS.A5:JS.A48 JS.H5:JS.H48" chart:data-source-has-labels="both" svg:x="0.513cm" svg:y="0.339cm" svg:width="21.604cm" svg:height="16.306cm">
          <chart:coordinate-region svg:x="1.796cm" svg:y="0.538cm" svg:width="20.321cm" svg:height="14.117cm"/>
          <chart:axis chart:dimension="x" chart:name="primary-x" chart:style-name="ch4" chartooo:axis-type="auto">
            <chartooo:date-scale/>
            <chart:categories table:cell-range-address="JS.A6:JS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S.H6:JS.H48" chart:label-cell-address="JS.H5:JS.H5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(ms)</text:p>
                <draw:g>
                  <svg:desc>JS.H5:JS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lib 1.3.1 -1</text:p>
                <draw:g>
                  <svg:desc>JS.A6:JS.A48</svg:desc>
                </draw:g>
              </table:table-cell>
              <table:table-cell office:value-type="float" office:value="337.731251642928">
                <text:p>337.731251642928</text:p>
                <draw:g>
                  <svg:desc>JS.H6:JS.H48</svg:desc>
                </draw:g>
              </table:table-cell>
            </table:table-row>
            <table:table-row>
              <table:table-cell office:value-type="string">
                <text:p>zlib 1.3.1 -2</text:p>
              </table:table-cell>
              <table:table-cell office:value-type="float" office:value="327.627124556406">
                <text:p>327.627124556406</text:p>
              </table:table-cell>
            </table:table-row>
            <table:table-row>
              <table:table-cell office:value-type="string">
                <text:p>zlib 1.3.1 -3</text:p>
              </table:table-cell>
              <table:table-cell office:value-type="float" office:value="321.526166129318">
                <text:p>321.526166129318</text:p>
              </table:table-cell>
            </table:table-row>
            <table:table-row>
              <table:table-cell office:value-type="string">
                <text:p>zlib 1.3.1 -4</text:p>
              </table:table-cell>
              <table:table-cell office:value-type="float" office:value="306.102541423427">
                <text:p>306.102541423427</text:p>
              </table:table-cell>
            </table:table-row>
            <table:table-row>
              <table:table-cell office:value-type="string">
                <text:p>zlib 1.3.1 -5</text:p>
              </table:table-cell>
              <table:table-cell office:value-type="float" office:value="301.188880928631">
                <text:p>301.188880928631</text:p>
              </table:table-cell>
            </table:table-row>
            <table:table-row>
              <table:table-cell office:value-type="string">
                <text:p>zlib 1.3.1 -6</text:p>
              </table:table-cell>
              <table:table-cell office:value-type="float" office:value="303.088671852235">
                <text:p>303.088671852235</text:p>
              </table:table-cell>
            </table:table-row>
            <table:table-row>
              <table:table-cell office:value-type="string">
                <text:p>zlib 1.3.1 -7</text:p>
              </table:table-cell>
              <table:table-cell office:value-type="float" office:value="305.101017994534">
                <text:p>305.101017994534</text:p>
              </table:table-cell>
            </table:table-row>
            <table:table-row>
              <table:table-cell office:value-type="string">
                <text:p>brotli 1.2.0 -0</text:p>
              </table:table-cell>
              <table:table-cell office:value-type="float" office:value="338.167790427849">
                <text:p>338.167790427849</text:p>
              </table:table-cell>
            </table:table-row>
            <table:table-row>
              <table:table-cell office:value-type="string">
                <text:p>brotli 1.2.0 -1</text:p>
              </table:table-cell>
              <table:table-cell office:value-type="float" office:value="321.973701658743">
                <text:p>321.973701658743</text:p>
              </table:table-cell>
            </table:table-row>
            <table:table-row>
              <table:table-cell office:value-type="string">
                <text:p>brotli 1.2.0 -2</text:p>
              </table:table-cell>
              <table:table-cell office:value-type="float" office:value="295.595785536288">
                <text:p>295.595785536288</text:p>
              </table:table-cell>
            </table:table-row>
            <table:table-row>
              <table:table-cell office:value-type="string">
                <text:p>brotli 1.2.0 -3</text:p>
              </table:table-cell>
              <table:table-cell office:value-type="float" office:value="292.374878564165">
                <text:p>292.374878564165</text:p>
              </table:table-cell>
            </table:table-row>
            <table:table-row>
              <table:table-cell office:value-type="string">
                <text:p>brotli 1.2.0 -4</text:p>
              </table:table-cell>
              <table:table-cell office:value-type="float" office:value="286.328560049185">
                <text:p>286.328560049185</text:p>
              </table:table-cell>
            </table:table-row>
            <table:table-row>
              <table:table-cell office:value-type="string">
                <text:p>brotli 1.2.0 -5</text:p>
              </table:table-cell>
              <table:table-cell office:value-type="float" office:value="267.160494499398">
                <text:p>267.160494499398</text:p>
              </table:table-cell>
            </table:table-row>
            <table:table-row>
              <table:table-cell office:value-type="string">
                <text:p>brotli 1.2.0 -6</text:p>
              </table:table-cell>
              <table:table-cell office:value-type="float" office:value="265.791736970813">
                <text:p>265.791736970813</text:p>
              </table:table-cell>
            </table:table-row>
            <table:table-row>
              <table:table-cell office:value-type="string">
                <text:p>zstd 1.5.7 -1</text:p>
              </table:table-cell>
              <table:table-cell office:value-type="float" office:value="322.566132979254">
                <text:p>322.566132979254</text:p>
              </table:table-cell>
            </table:table-row>
            <table:table-row>
              <table:table-cell office:value-type="string">
                <text:p>zstd 1.5.7 -2</text:p>
              </table:table-cell>
              <table:table-cell office:value-type="float" office:value="301.384288686548">
                <text:p>301.384288686548</text:p>
              </table:table-cell>
            </table:table-row>
            <table:table-row>
              <table:table-cell office:value-type="string">
                <text:p>zstd 1.5.7 -3</text:p>
              </table:table-cell>
              <table:table-cell office:value-type="float" office:value="286.385947660668">
                <text:p>286.385947660668</text:p>
              </table:table-cell>
            </table:table-row>
            <table:table-row>
              <table:table-cell office:value-type="string">
                <text:p>zstd 1.5.7 -4</text:p>
              </table:table-cell>
              <table:table-cell office:value-type="float" office:value="284.82943146116">
                <text:p>284.82943146116</text:p>
              </table:table-cell>
            </table:table-row>
            <table:table-row>
              <table:table-cell office:value-type="string">
                <text:p>zstd 1.5.7 -5</text:p>
              </table:table-cell>
              <table:table-cell office:value-type="float" office:value="275.332388983645">
                <text:p>275.332388983645</text:p>
              </table:table-cell>
            </table:table-row>
            <table:table-row>
              <table:table-cell office:value-type="string">
                <text:p>zstd 1.5.7 -6</text:p>
              </table:table-cell>
              <table:table-cell office:value-type="float" office:value="268.222769329533">
                <text:p>268.222769329533</text:p>
              </table:table-cell>
            </table:table-row>
            <table:table-row>
              <table:table-cell office:value-type="string">
                <text:p>zstd 1.5.7 -7</text:p>
              </table:table-cell>
              <table:table-cell office:value-type="float" office:value="266.314508883478">
                <text:p>266.314508883478</text:p>
              </table:table-cell>
            </table:table-row>
            <table:table-row>
              <table:table-cell office:value-type="string">
                <text:p>zstd 1.5.7 -8</text:p>
              </table:table-cell>
              <table:table-cell office:value-type="float" office:value="266.181569689785">
                <text:p>266.181569689785</text:p>
              </table:table-cell>
            </table:table-row>
            <table:table-row>
              <table:table-cell office:value-type="string">
                <text:p>zstd 1.5.7 -9</text:p>
              </table:table-cell>
              <table:table-cell office:value-type="float" office:value="266.31030929354">
                <text:p>266.31030929354</text:p>
              </table:table-cell>
            </table:table-row>
            <table:table-row>
              <table:table-cell office:value-type="string">
                <text:p>zstd 1.5.7 -10</text:p>
              </table:table-cell>
              <table:table-cell office:value-type="float" office:value="268.070856595505">
                <text:p>268.070856595505</text:p>
              </table:table-cell>
            </table:table-row>
            <table:table-row>
              <table:table-cell office:value-type="string">
                <text:p>zstd 1.5.7 -11</text:p>
              </table:table-cell>
              <table:table-cell office:value-type="float" office:value="271.80540099054">
                <text:p>271.80540099054</text:p>
              </table:table-cell>
            </table:table-row>
            <table:table-row>
              <table:table-cell office:value-type="string">
                <text:p>zstd 1.5.7 -12</text:p>
              </table:table-cell>
              <table:table-cell office:value-type="float" office:value="271.981298420745">
                <text:p>271.981298420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